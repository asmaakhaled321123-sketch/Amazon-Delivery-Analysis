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58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1">
      <style:graphic-properties fo:wrap-option="no-wrap" fo:padding-top="0.05in" fo:padding-bottom="0.05in" fo:padding-left="0.1in" fo:padding-right="0.1in" draw:textarea-vertical-align="middle" draw:textarea-horizontal-align="left" draw:fill="solid" draw:fill-color="#000000" draw:opacity="100%" draw:stroke="solid" svg:stroke-width="0.01042in" svg:stroke-color="#000000" svg:stroke-opacity="100%" draw:stroke-linejoin="miter" svg:stroke-linecap="butt" draw:auto-grow-width="true" draw:auto-grow-height="tru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gradient" draw:fill-gradient-name="a702" draw:stroke="none" draw:auto-grow-width="false" draw:auto-grow-height="false" draw:decorative="true" style:protect="position siz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3" style:parent-style-name="Graphics">
      <style:graphic-properties draw:fill="none" fo:clip="rect(0in, 5.80843in, 0in, 4.21824in)" draw:stroke="none"/>
    </style:style>
    <style:style style:family="drawing-page" style:name="a7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mbria" style:font-family-complex="Arial" style:font-family-generic="roman"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mbria" style:font-family-complex="Arial" style:font-family-generic="roman"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3" style:parent-style-name="Graphics">
      <style:graphic-properties draw:fill="none" fo:clip="rect(0in, 5.80843in, 0in, 4.21824in)" draw:stroke="non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mbria" style:font-family-complex="Arial" style:font-family-generic="roman"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mbria" style:font-family-complex="Arial" style:font-family-generic="roman"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3">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parent-style-name="Graphics">
      <style:graphic-properties draw:fill="none" draw:stroke="non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parent-style-name="Graphics">
      <style:graphic-properties draw:fill="none" fo:clip="rect(1.21513in, 1.93941in, 0.61991in, 0in)" draw:stroke="non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169c9a"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0">
      <style:text-properties fo:font-variant="normal" fo:text-transform="none" fo:color="#169c9a"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3" style:parent-style-name="Graphics">
      <style:graphic-properties draw:fill="none" draw:stroke="non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style:font-family-asian="MS Gothic" style:font-family-complex="Times New Roman" style:font-family-generic="swiss" style:font-family-generic-asian="modern" style:font-family-generic-complex="roman" style:font-pitch="variable" style:font-pitch-asian="fixed"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169c9a"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333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Unicode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parent-style-name="Graphics">
      <style:graphic-properties draw:fill="none" draw:stroke="none"/>
    </style:style>
    <style:style style:family="paragraph" style:name="a972">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Unicode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6">
      <style:text-properties fo:font-variant="normal" fo:text-transform="none" fo:color="#169c9a"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169c9a"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37">
      <style:graphic-properties draw:fill="none" draw:stroke="non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draw:fill="none" draw:stroke="none"/>
    </style:style>
    <style:style style:family="paragraph" style:name="a1314">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Unicode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style:font-family-asian="MS Gothic" style:font-family-complex="Times New Roman" style:font-family-generic="swiss" style:font-family-generic-asian="modern" style:font-family-generic-complex="roman" style:font-pitch="variable" style:font-pitch-asian="fixed"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20%" fo:text-align="left" style:tab-stop-distance="1in" fo:margin-left="0in" fo:margin-right="0in" fo:text-indent="0.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5">
      <style:graphic-properties fo:wrap-option="wrap" fo:padding-top="0.1388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12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parent-style-name="Graphics">
      <style:graphic-properties draw:fill="none" fo:clip="rect(0in, 3.54603in, 0.00028in, 6.21909in)" draw:stroke="non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Unicode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text-transform="uppercase" fo:color="#000000" style:text-line-through-type="none" style:text-line-through-style="none" style:text-line-through-width="auto" style:text-line-through-color="font-color" style:text-position="0% 100%" fo:font-family="Neue Haas Grotesk Tex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06">
      <style:graphic-properties draw:fill="none" draw:stroke="none"/>
    </style:style>
    <style:style style:family="drawing-page" style:name="a14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1in" fo:margin-left="0in" fo:margin-right="0in" fo:text-indent="0.2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169c9a"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in" fo:margin-left="0in" fo:margin-right="0in" fo:text-indent="0in" fo:margin-top="0in" fo:margin-bottom="0.08333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text-transform="uppercas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15">
      <style:graphic-properties draw:fill="none" draw:stroke="non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text-transform="uppercas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0">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8">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draw:fill="none" draw:stroke="none"/>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Neue Haas Grotesk Tex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1">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0">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6">
      <style:graphic-properties draw:fill="none" draw:stroke="none"/>
    </style:style>
    <style:style style:family="paragraph" style:name="a1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text-transform="uppercas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text-transform="uppercas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text-transform="uppercas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Unicode MS" style:font-family-complex="Courier New" style:font-family-generic-complex="modern" style:font-pitch-complex="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87">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inheri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no-wrap" fo:padding-top="0in" fo:padding-bottom="0in" fo:padding-left="0in" fo:padding-right="0in" draw:textarea-vertical-align="middle" draw:textarea-horizontal-align="left" draw:fill="solid" draw:fill-color="#f1f3f4" draw:opacity="100%" draw:stroke="none" draw:auto-grow-width="true" draw:auto-grow-height="tru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9">
      <style:graphic-properties draw:fill="none" draw:stroke="none"/>
    </style:style>
    <style:style style:family="paragraph" style:name="a1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607">
      <style:graphic-properties draw:fill="none" draw:stroke="solid" svg:stroke-width="0.01389in" svg:stroke-color="#000000" svg:stroke-opacity="100%"/>
    </style:style>
    <style:style style:family="presentation" style:name="a1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11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text-transform="uppercas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81">
      <style:graphic-properties draw:fill="none" draw:stroke="non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text-transform="uppercase" fo:color="#0000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9">
      <style:graphic-properties draw:fill="none" draw:stroke="non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Neue Haas Grotesk Tex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text-transform="uppercase" fo:color="#000000" style:text-line-through-type="none" style:text-line-through-style="none" style:text-line-through-width="auto" style:text-line-through-color="font-color" style:text-position="0% 100%" fo:font-family="Neue Haas Grotesk Tex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8">
      <style:graphic-properties draw:fill="none" draw:stroke="non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Neue Haas Grotesk Tex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aragraph" style:name="a16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style:language-complex="ar" style:country-complex="E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9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4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0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8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8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2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5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7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9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6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2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5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0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0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3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2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5in"/>
        <style:text-properties fo:font-family="Arial" style:font-family-generic="swiss" style:font-pitch="variable" fo:font-size="100%"/>
      </text:list-level-style-bullet>
      <text:list-level-style-bullet text:level="4" text:bullet-char="•">
        <style:list-level-properties text:space-before="0.75in"/>
        <style:text-properties fo:font-family="Arial" style:font-family-generic="swiss" style:font-pitch="variable" fo:font-size="100%"/>
      </text:list-level-style-bullet>
      <text:list-level-style-bullet text:level="5" text:bullet-char="•">
        <style:list-level-properties text:space-before="1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695" draw:master-page-name="Master1-Layout1-title-Title-Slide" presentation:presentation-page-layout-name="Master1-PPL1" draw:id="Slide-256">
        <draw:custom-shape svg:x="0in" svg:y="0in" svg:width="13.33333in" svg:height="7.5in" draw:id="id69" draw:style-name="a698" draw:name="Rectangle 15">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70" draw:style-name="a699" draw:name="Picture 3" svg:x="0.00002in" svg:y="0in" svg:width="13.33331in" svg:height="7.5in" style:rel-width="scale" style:rel-height="scale">
          <draw:image xlink:href="media/image1.jpeg" xlink:type="simple" xlink:show="embed" xlink:actuate="onLoad"/>
          <svg:title/>
          <svg:desc/>
        </draw:frame>
        <draw:custom-shape svg:width="7.5in" svg:height="9.14483in" draw:id="id71" draw:style-name="a703" draw:transform="translate(-3.75in -4.57241in) rotate(-1.5708) translate(4.5724in 3.75in)" draw:name="Rectangle 17">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frame draw:id="id72" presentation:style-name="a706" draw:name="Title 1" svg:x="0.68561in" svg:y="3.75in" svg:width="4.92789in" svg:height="2.06555in" presentation:class="title" presentation:placeholder="false">
          <draw:text-box>
            <text:p text:style-name="a705" text:class-names="" text:cond-style-name=""><text:span text:style-name="a704" text:class-names="">Amazon Delivery Project Documentation<text:s text:c="1"/></text:span></text:p>
          </draw:text-box>
          <svg:title/>
          <svg:desc/>
        </draw:frame>
        <draw:frame draw:id="id73" presentation:style-name="a711" draw:name="Subtitle 2" svg:x="0.6856in" svg:y="5.93638in" svg:width="4.92789in" svg:height="0.98386in" presentation:class="subtitle" presentation:placeholder="false">
          <draw:text-box>
            <text:p text:style-name="a708" text:class-names="" text:cond-style-name=""><text:span text:style-name="a707" text:class-names="">Team Members: Yomna Elameer,Asmaa Khaled,Fatma Atef</text:span></text:p>
            <text:p text:style-name="a710" text:class-names="" text:cond-style-name=""><text:span text:style-name="a709" text:class-names=""/></text:p>
          </draw:text-box>
          <svg:title/>
          <svg:desc/>
        </draw:frame>
      </draw:page>
      <draw:page draw:name="Slide19" draw:style-name="a712" draw:master-page-name="Master1-Layout2-obj-Title-and-Content" presentation:presentation-page-layout-name="Master1-PPL2" draw:id="Slide-274">
        <draw:custom-shape svg:x="0in" svg:y="0in" svg:width="13.33333in" svg:height="7.5in" draw:id="id74" draw:style-name="a715" draw:name="Rectangle 8">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frame draw:id="id75" presentation:style-name="a718" draw:name="Title 1" svg:x="0.67in" svg:y="0.65625in" svg:width="6.6in" svg:height="1.67315in" presentation:class="title" presentation:placeholder="false">
          <draw:text-box>
            <text:p text:style-name="a717" text:class-names="" text:cond-style-name=""><text:span text:style-name="a716" text:class-names="">Goal project:</text:span></text:p>
          </draw:text-box>
          <svg:title/>
          <svg:desc/>
        </draw:frame>
        <draw:frame draw:id="id76" presentation:style-name="a722" draw:name="Content Placeholder 2" svg:x="0.67in" svg:y="2.42in" svg:width="6.6in" svg:height="4.48in" presentation:class="outline" presentation:placeholder="false">
          <draw:text-box>
            <text:list text:style-name="a721">
              <text:list-item>
                <text:p text:style-name="a720" text:class-names="" text:cond-style-name=""><text:span text:style-name="a719" text:class-names="">The objective of this project is to enhance delivery speed by analyzing key factors influencing performance. The analysis aims to provide actionable insights that support faster, more efficient, and reliable deliveries.</text:span></text:p>
              </text:list-item>
            </text:list>
          </draw:text-box>
          <svg:title/>
          <svg:desc/>
        </draw:frame>
        <draw:frame draw:id="id77" draw:style-name="a723" draw:name="Picture 4" svg:x="8.03333in" svg:y="0.00001in" svg:width="5.3in" svg:height="7.49999in" style:rel-width="scale" style:rel-height="scale">
          <draw:image xlink:href="media/image2.jpeg" xlink:type="simple" xlink:show="embed" xlink:actuate="onLoad"/>
          <svg:title/>
          <svg:desc>Boxes and roller conveyor</svg:desc>
        </draw:frame>
      </draw:page>
      <draw:page draw:name="Slide2" draw:style-name="a724" draw:master-page-name="Master1-Layout2-obj-Title-and-Content" presentation:presentation-page-layout-name="Master1-PPL2" draw:id="Slide-257">
        <draw:custom-shape svg:x="0in" svg:y="0in" svg:width="13.33333in" svg:height="7.5in" draw:id="id78" draw:style-name="a727" draw:name="Rectangle 8">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frame draw:id="id79" presentation:style-name="a730" draw:name="Title 1" svg:x="0.67in" svg:y="0.65625in" svg:width="6.6in" svg:height="1.67315in" presentation:class="title" presentation:placeholder="false">
          <draw:text-box>
            <text:p text:style-name="a729" text:class-names="" text:cond-style-name=""><text:span text:style-name="a728" text:class-names="">Brief About The Dataset:<text:line-break/></text:span></text:p>
          </draw:text-box>
          <svg:title/>
          <svg:desc/>
        </draw:frame>
        <draw:frame draw:id="id80" presentation:style-name="a742" draw:name="Content Placeholder 2" svg:x="0.67in" svg:y="2.42in" svg:width="6.6in" svg:height="4.48in" presentation:class="outline" presentation:placeholder="false">
          <draw:text-box>
            <text:list text:style-name="a733">
              <text:list-item>
                <text:p text:style-name="a732" text:class-names="" text:cond-style-name=""><text:span text:style-name="a731" text:class-names=""/></text:p>
              </text:list-item>
            </text:list>
            <text:list text:style-name="a738">
              <text:list-item>
                <text:p text:style-name="a737" text:class-names="" text:cond-style-name=""><text:span text:style-name="a734" text:class-names="">This dataset contains delivery orders from February, March, and April 2022. It includes details about the delivery agent, store and drop locations, and order timings. External factors such as weather and traffic conditions are also recorded. Finally, it tracks delivery time and product category, making it useful for analysis and service improvement</text:span><text:span text:style-name="a735" text:class-names="">:</text:span><text:span text:style-name="a736" text:class-names=""/></text:p>
              </text:list-item>
            </text:list>
            <text:list text:style-name="a741">
              <text:list-item>
                <text:p text:style-name="a740" text:class-names="" text:cond-style-name=""><text:span text:style-name="a739" text:class-names=""/></text:p>
              </text:list-item>
            </text:list>
          </draw:text-box>
          <svg:title/>
          <svg:desc/>
        </draw:frame>
        <draw:frame draw:id="id81" draw:style-name="a743" draw:name="Picture 4" svg:x="8.03333in" svg:y="0.00001in" svg:width="5.3in" svg:height="7.49999in" style:rel-width="scale" style:rel-height="scale">
          <draw:image xlink:href="media/image2.jpeg" xlink:type="simple" xlink:show="embed" xlink:actuate="onLoad"/>
          <svg:title/>
          <svg:desc>Boxes and roller conveyor</svg:desc>
        </draw:frame>
      </draw:page>
      <draw:page draw:name="Slide3" draw:style-name="a744" draw:master-page-name="Master1-Layout2-obj-Title-and-Content" presentation:presentation-page-layout-name="Master1-PPL2" draw:id="Slide-258">
        <draw:custom-shape svg:x="0in" svg:y="0in" svg:width="13.33333in" svg:height="7.5in" draw:id="id82" draw:style-name="a747" draw:name="Rectangle 104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frame draw:id="id83" presentation:style-name="a757" draw:name="Content Placeholder 1046" svg:x="9.04464in" svg:y="3.7325in" svg:width="3.51323in" svg:height="3.02643in" presentation:class="outline" presentation:placeholder="false">
          <draw:text-box>
            <text:list text:style-name="a750">
              <text:list-item>
                <text:p text:style-name="a749" text:class-names="" text:cond-style-name=""><text:span text:style-name="a748" text:class-names="">About Dataset</text:span></text:p>
              </text:list-item>
            </text:list>
            <text:list text:style-name="a753">
              <text:list-item>
                <text:p text:style-name="a752" text:class-names="" text:cond-style-name=""><text:span text:style-name="a751" text:class-names="">This Amazon Delivery Dataset provides a comprehensive view of the company's last-mile logistics operations. It includes data on over 43,632 deliveries across multiple cities, with detailed information on order details, delivery agents, weather and traffic conditions, and delivery performance metrics. The dataset enables researchers and analysts to uncover insights into factors influencing delivery efficiency, identify areas for optimization, and explore the impact of various variables on the overall customer experience.</text:span></text:p>
              </text:list-item>
            </text:list>
            <text:list text:style-name="a756">
              <text:list-item>
                <text:p text:style-name="a755" text:class-names="" text:cond-style-name=""><text:span text:style-name="a754" text:class-names=""/></text:p>
              </text:list-item>
            </text:list>
          </draw:text-box>
          <svg:title/>
          <svg:desc/>
        </draw:frame>
        <draw:frame draw:id="id84" draw:style-name="a758" draw:name="Picture 5" svg:x="0.55696in" svg:y="0.45787in" svg:width="8.6076in" svg:height="6.58425in" style:rel-width="scale" style:rel-height="scale">
          <draw:image xlink:href="media/image3.png" xlink:type="simple" xlink:show="embed" xlink:actuate="onLoad"/>
          <svg:title/>
          <svg:desc/>
        </draw:frame>
      </draw:page>
      <draw:page draw:name="Slide7" draw:style-name="a759" draw:master-page-name="Master1-Layout2-obj-Title-and-Content" presentation:presentation-page-layout-name="Master1-PPL2" draw:id="Slide-262">
        <draw:frame draw:id="id85" presentation:style-name="a762" draw:name="Title 1" svg:x="0.67in" svg:y="0.6in" svg:width="11.65089in" svg:height="1.23825in" presentation:class="title" presentation:placeholder="false">
          <draw:text-box>
            <text:p text:style-name="a761" text:class-names="" text:cond-style-name=""><text:span text:style-name="a760" text:class-names="">Dataset Issues:</text:span></text:p>
          </draw:text-box>
          <svg:title/>
          <svg:desc/>
        </draw:frame>
        <draw:frame draw:id="id86" presentation:style-name="a887" draw:name="Rectangle 1" svg:x="0.67in" svg:y="1.17365in" svg:width="6.71782in" svg:height="6.42884in" presentation:class="outline" presentation:placeholder="false">
          <draw:text-box>
            <text:list text:style-name="a766">
              <text:list-item>
                <text:p text:style-name="a765" text:class-names="" text:cond-style-name=""><text:span text:style-name="a763" text:class-names="">Order_ID:</text:span><text:span text:style-name="a764" text:class-names=""/></text:p>
              </text:list-item>
            </text:list>
            <text:list text:style-name="a771">
              <text:list-item>
                <text:p text:style-name="a770" text:class-names="" text:cond-style-name=""><text:span text:style-name="a767" text:class-names="">· <text:s text:c="1"/></text:span><text:span text:style-name="a768" text:class-names="">Description</text:span><text:span text:style-name="a769" text:class-names="">: Unique identifier for each order.</text:span></text:p>
              </text:list-item>
            </text:list>
            <text:list text:style-name="a776">
              <text:list-item>
                <text:p text:style-name="a775" text:class-names="" text:cond-style-name=""><text:span text:style-name="a772" text:class-names=""><text:s text:c="1"/>· <text:s text:c="1"/></text:span><text:span text:style-name="a773" text:class-names="">Issues</text:span><text:span text:style-name="a774" text:class-names="">: No missing values, but values are non-numeric (strings).</text:span></text:p>
              </text:list-item>
            </text:list>
            <text:list text:style-name="a781">
              <text:list-item>
                <text:p text:style-name="a780" text:class-names="" text:cond-style-name=""><text:span text:style-name="a777" text:class-names="">· <text:s text:c="1"/></text:span><text:span text:style-name="a778" text:class-names="">Handling</text:span><text:span text:style-name="a779" text:class-names="">: Kept as is since it is just an identifier.</text:span></text:p>
              </text:list-item>
            </text:list>
            <text:list text:style-name="a787">
              <text:list-item>
                <text:p text:style-name="a786" text:class-names="" text:cond-style-name=""><text:span text:style-name="a782" text:class-names="">· <text:s text:c="1"/></text:span><text:span text:style-name="a783" text:class-names="">Impact</text:span><text:span text:style-name="a784" text:class-names="">: Used as a reference key, not for analysis</text:span><text:span text:style-name="a785" text:class-names="">.</text:span></text:p>
              </text:list-item>
            </text:list>
            <text:list text:style-name="a790">
              <text:list-item>
                <text:p text:style-name="a789" text:class-names="" text:cond-style-name=""><text:span text:style-name="a788" text:class-names="">Agent_Age:</text:span></text:p>
              </text:list-item>
            </text:list>
            <text:list text:style-name="a794">
              <text:list-item>
                <text:p text:style-name="a793" text:class-names="" text:cond-style-name=""><text:span text:style-name="a791" text:class-names="">Description</text:span><text:span text:style-name="a792" text:class-names="">: Age of the delivery agent.</text:span></text:p>
              </text:list-item>
            </text:list>
            <text:list text:style-name="a798">
              <text:list-item>
                <text:p text:style-name="a797" text:class-names="" text:cond-style-name=""><text:span text:style-name="a795" text:class-names="">Issues</text:span><text:span text:style-name="a796" text:class-names="">: Possible invalid values (e.g., &lt;18 or &gt;70).</text:span></text:p>
              </text:list-item>
            </text:list>
            <text:list text:style-name="a802">
              <text:list-item>
                <text:p text:style-name="a801" text:class-names="" text:cond-style-name=""><text:span text:style-name="a799" text:class-names="">Handling</text:span><text:span text:style-name="a800" text:class-names="">: Outliers filtered and replaced with median age.</text:span></text:p>
              </text:list-item>
            </text:list>
            <text:list text:style-name="a806">
              <text:list-item>
                <text:p text:style-name="a805" text:class-names="" text:cond-style-name=""><text:span text:style-name="a803" text:class-names="">Impact</text:span><text:span text:style-name="a804" text:class-names="">: Ensures fair analysis of age-related performance without skew.</text:span></text:p>
              </text:list-item>
            </text:list>
            <text:list text:style-name="a810">
              <text:list-item>
                <text:p text:style-name="a809" text:class-names="" text:cond-style-name=""><text:span text:style-name="a807" text:class-names="">Agent_Rating:</text:span><text:span text:style-name="a808" text:class-names=""/></text:p>
              </text:list-item>
            </text:list>
            <text:list text:style-name="a815">
              <text:list-item>
                <text:p text:style-name="a814" text:class-names="" text:cond-style-name=""><text:span text:style-name="a811" text:class-names="">· <text:s text:c="1"/></text:span><text:span text:style-name="a812" text:class-names="">Description: Customer rating of the delivery agent (1–5).</text:span><text:span text:style-name="a813" text:class-names=""/></text:p>
              </text:list-item>
            </text:list>
            <text:list text:style-name="a820">
              <text:list-item>
                <text:p text:style-name="a819" text:class-names="" text:cond-style-name=""><text:span text:style-name="a816" text:class-names="">· <text:s text:c="1"/></text:span><text:span text:style-name="a817" text:class-names="">Issues: 54 missing values.</text:span><text:span text:style-name="a818" text:class-names=""/></text:p>
              </text:list-item>
            </text:list>
            <text:list text:style-name="a825">
              <text:list-item>
                <text:p text:style-name="a824" text:class-names="" text:cond-style-name=""><text:span text:style-name="a821" text:class-names="">· <text:s text:c="1"/></text:span><text:span text:style-name="a822" text:class-names="">Handling : Missing ratings replaced with mean/median rating.</text:span><text:span text:style-name="a823" text:class-names=""/></text:p>
              </text:list-item>
            </text:list>
            <text:list text:style-name="a830">
              <text:list-item>
                <text:p text:style-name="a829" text:class-names="" text:cond-style-name=""><text:span text:style-name="a826" text:class-names="">· <text:s text:c="1"/></text:span><text:span text:style-name="a827" text:class-names="">Impact: Prevents bias in analyzing performance vs. ratings.</text:span><text:span text:style-name="a828" text:class-names=""/></text:p>
              </text:list-item>
            </text:list>
            <text:list text:style-name="a834">
              <text:list-item>
                <text:p text:style-name="a833" text:class-names="" text:cond-style-name=""><text:span text:style-name="a831" text:class-names="">Store_Latitude &amp; Store_Longitude:</text:span><text:span text:style-name="a832" text:class-names=""/></text:p>
              </text:list-item>
            </text:list>
            <text:list text:style-name="a839">
              <text:list-item>
                <text:p text:style-name="a838" text:class-names="" text:cond-style-name=""><text:span text:style-name="a835" text:class-names="">· <text:s text:c="1"/></text:span><text:span text:style-name="a836" text:class-names="">Description</text:span><text:span text:style-name="a837" text:class-names="">: Location of the store (pickup point).</text:span></text:p>
              </text:list-item>
            </text:list>
            <text:list text:style-name="a844">
              <text:list-item>
                <text:p text:style-name="a843" text:class-names="" text:cond-style-name=""><text:span text:style-name="a840" text:class-names="">· <text:s text:c="2"/></text:span><text:span text:style-name="a841" text:class-names="">Issues</text:span><text:span text:style-name="a842" text:class-names="">: No nulls but long names.</text:span></text:p>
              </text:list-item>
            </text:list>
            <text:list text:style-name="a853">
              <text:list-item>
                <text:p text:style-name="a852" text:class-names="" text:cond-style-name=""><text:span text:style-name="a845" text:class-names="">· <text:s text:c="2"/></text:span><text:span text:style-name="a846" text:class-names="">Handling</text:span><text:span text:style-name="a847" text:class-names="">: Renamed to<text:s text:c="1"/></text:span><text:span text:style-name="a848" text:class-names="">Store_Lat</text:span><text:span text:style-name="a849" text:class-names="">,<text:s text:c="1"/></text:span><text:span text:style-name="a850" text:class-names="">Store_Lon</text:span><text:span text:style-name="a851" text:class-names="">.</text:span></text:p>
              </text:list-item>
            </text:list>
            <text:list text:style-name="a858">
              <text:list-item>
                <text:p text:style-name="a857" text:class-names="" text:cond-style-name=""><text:span text:style-name="a854" text:class-names="">· <text:s text:c="1"/></text:span><text:span text:style-name="a855" text:class-names="">Impact</text:span><text:span text:style-name="a856" text:class-names="">: Used for calculating delivery distance</text:span></text:p>
              </text:list-item>
            </text:list>
            <text:list text:style-name="a861">
              <text:list-item>
                <text:p text:style-name="a860" text:class-names="" text:cond-style-name=""><text:span text:style-name="a859" text:class-names="">Drop_Latitude &amp; Drop_Longitude:</text:span></text:p>
              </text:list-item>
            </text:list>
            <text:list text:style-name="a866">
              <text:list-item>
                <text:p text:style-name="a865" text:class-names="" text:cond-style-name=""><text:span text:style-name="a862" text:class-names="">· <text:s text:c="1"/></text:span><text:span text:style-name="a863" text:class-names="">Description</text:span><text:span text:style-name="a864" text:class-names="">: Location of the customer (drop point).</text:span></text:p>
              </text:list-item>
            </text:list>
            <text:list text:style-name="a871">
              <text:list-item>
                <text:p text:style-name="a870" text:class-names="" text:cond-style-name=""><text:span text:style-name="a867" text:class-names="">· <text:s text:c="1"/></text:span><text:span text:style-name="a868" text:class-names="">Issues</text:span><text:span text:style-name="a869" text:class-names="">: No nulls, same naming issue.</text:span></text:p>
              </text:list-item>
            </text:list>
            <text:list text:style-name="a880">
              <text:list-item>
                <text:p text:style-name="a879" text:class-names="" text:cond-style-name=""><text:span text:style-name="a872" text:class-names="">· <text:s text:c="1"/></text:span><text:span text:style-name="a873" text:class-names="">Handling</text:span><text:span text:style-name="a874" text:class-names="">: Renamed to<text:s text:c="1"/></text:span><text:span text:style-name="a875" text:class-names="">Drop_Lat</text:span><text:span text:style-name="a876" text:class-names="">,<text:s text:c="1"/></text:span><text:span text:style-name="a877" text:class-names="">Drop_Lon</text:span><text:span text:style-name="a878" text:class-names="">.</text:span></text:p>
              </text:list-item>
            </text:list>
            <text:list text:style-name="a886">
              <text:list-item>
                <text:p text:style-name="a885" text:class-names="" text:cond-style-name=""><text:span text:style-name="a881" text:class-names="">· <text:s text:c="1"/></text:span><text:span text:style-name="a882" text:class-names="">Impact</text:span><text:span text:style-name="a883" text:class-names="">: Paired with store location to calculate delivery distanc</text:span><text:span text:style-name="a884" text:class-names=""/></text:p>
              </text:list-item>
            </text:list>
          </draw:text-box>
          <svg:title/>
          <svg:desc/>
        </draw:frame>
      </draw:page>
      <draw:page draw:name="Slide5" draw:style-name="a888" draw:master-page-name="Master1-Layout2-obj-Title-and-Content" presentation:presentation-page-layout-name="Master1-PPL2" draw:id="Slide-260">
        <draw:custom-shape svg:x="0in" svg:y="0in" svg:width="13.33333in" svg:height="7.5in" draw:id="id87" draw:style-name="a891" draw:name="Rectangle 15">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frame draw:id="id88" presentation:style-name="a894" draw:name="Title 1" svg:x="0.67222in" svg:y="0.78987in" svg:width="5.227in" svg:height="2.26127in" presentation:class="title" presentation:placeholder="false">
          <draw:text-box>
            <text:p text:style-name="a893" text:class-names="" text:cond-style-name=""><text:span text:style-name="a892" text:class-names="">Dataset Issues:</text:span></text:p>
          </draw:text-box>
          <svg:title/>
          <svg:desc/>
        </draw:frame>
        <draw:frame draw:id="id89" draw:style-name="a895" draw:name="Graphic 7" svg:x="0.8in" svg:y="3.2549in" svg:width="3.6451in" svg:height="3.6451in" style:rel-width="scale" style:rel-height="scale">
          <draw:image xlink:href="media/image4.svg" xlink:type="simple" xlink:show="embed" xlink:actuate="onLoad"/>
          <svg:title/>
          <svg:desc>Lightning</svg:desc>
        </draw:frame>
        <draw:frame draw:id="id90" presentation:style-name="a1043" draw:name="Rectangle 1" svg:x="6.59509in" svg:y="0.6in" svg:width="6.06602in" svg:height="6.3in" presentation:class="outline" presentation:placeholder="false">
          <draw:text-box>
            <text:list text:style-name="a899">
              <text:list-item>
                <text:p text:style-name="a898" text:class-names="" text:cond-style-name=""><text:span text:style-name="a896" text:class-names="">Weather:</text:span><text:span text:style-name="a897" text:class-names=""/></text:p>
              </text:list-item>
            </text:list>
            <text:list text:style-name="a904">
              <text:list-item>
                <text:p text:style-name="a903" text:class-names="" text:cond-style-name=""><text:span text:style-name="a900" text:class-names="">· <text:s text:c="1"/></text:span><text:span text:style-name="a901" text:class-names="">Description</text:span><text:span text:style-name="a902" text:class-names="">: Weather condition during delivery.</text:span></text:p>
              </text:list-item>
            </text:list>
            <text:list text:style-name="a909">
              <text:list-item>
                <text:p text:style-name="a908" text:class-names="" text:cond-style-name=""><text:span text:style-name="a905" text:class-names="">· <text:s text:c="1"/></text:span><text:span text:style-name="a906" text:class-names="">Issues</text:span><text:span text:style-name="a907" text:class-names="">: 91 missing values.</text:span></text:p>
              </text:list-item>
            </text:list>
            <text:list text:style-name="a920">
              <text:list-item>
                <text:p text:style-name="a919" text:class-names="" text:cond-style-name=""><text:span text:style-name="a910" text:class-names="">· <text:s text:c="1"/></text:span><text:span text:style-name="a911" text:class-names="">Handling</text:span><text:span text:style-name="a912" text:class-names="">: Missing values replaced with “Unknown”. Categories grouped into<text:s text:c="1"/></text:span><text:span text:style-name="a913" text:class-names="">Good_Weather</text:span><text:span text:style-name="a914" text:class-names="">,<text:s text:c="1"/></text:span><text:span text:style-name="a915" text:class-names="">Bad_Weather</text:span><text:span text:style-name="a916" text:class-names="">,<text:s text:c="1"/></text:span><text:span text:style-name="a917" text:class-names="">Extreme</text:span><text:span text:style-name="a918" text:class-names="">.</text:span></text:p>
              </text:list-item>
            </text:list>
            <text:list text:style-name="a925">
              <text:list-item>
                <text:p text:style-name="a924" text:class-names="" text:cond-style-name=""><text:span text:style-name="a921" text:class-names="">· <text:s text:c="1"/></text:span><text:span text:style-name="a922" text:class-names="">Impact</text:span><text:span text:style-name="a923" text:class-names="">: Helped show delivery delays in stormy/sandstorm conditions.</text:span></text:p>
              </text:list-item>
            </text:list>
            <text:list text:style-name="a929">
              <text:list-item>
                <text:p text:style-name="a928" text:class-names="" text:cond-style-name=""><text:span text:style-name="a926" text:class-names="">Traffic:</text:span><text:span text:style-name="a927" text:class-names=""/></text:p>
              </text:list-item>
            </text:list>
            <text:list text:style-name="a934">
              <text:list-item>
                <text:p text:style-name="a933" text:class-names="" text:cond-style-name=""><text:span text:style-name="a930" text:class-names="">· <text:s text:c="1"/></text:span><text:span text:style-name="a931" text:class-names="">Description</text:span><text:span text:style-name="a932" text:class-names="">: Traffic level during delivery (Low, Medium, High, Jam).</text:span></text:p>
              </text:list-item>
            </text:list>
            <text:list text:style-name="a939">
              <text:list-item>
                <text:p text:style-name="a938" text:class-names="" text:cond-style-name=""><text:span text:style-name="a935" text:class-names="">· <text:s text:c="1"/></text:span><text:span text:style-name="a936" text:class-names="">Issues</text:span><text:span text:style-name="a937" text:class-names="">: Inconsistent spelling issues (standardized).</text:span></text:p>
              </text:list-item>
            </text:list>
            <text:list text:style-name="a944">
              <text:list-item>
                <text:p text:style-name="a943" text:class-names="" text:cond-style-name=""><text:span text:style-name="a940" text:class-names="">· <text:s text:c="1"/></text:span><text:span text:style-name="a941" text:class-names="">Handling</text:span><text:span text:style-name="a942" text:class-names="">: Cleaned and standardized categories.</text:span></text:p>
              </text:list-item>
            </text:list>
            <text:list text:style-name="a949">
              <text:list-item>
                <text:p text:style-name="a948" text:class-names="" text:cond-style-name=""><text:span text:style-name="a945" text:class-names="">· <text:s text:c="1"/></text:span><text:span text:style-name="a946" text:class-names="">Impact</text:span><text:span text:style-name="a947" text:class-names="">: Strong correlation with delivery time (higher traffic → longer delivery).</text:span></text:p>
              </text:list-item>
            </text:list>
            <text:list text:style-name="a953">
              <text:list-item>
                <text:p text:style-name="a952" text:class-names="" text:cond-style-name=""><text:span text:style-name="a950" text:class-names="">Vehicle:</text:span><text:span text:style-name="a951" text:class-names=""/></text:p>
              </text:list-item>
            </text:list>
            <text:list text:style-name="a958">
              <text:list-item>
                <text:p text:style-name="a957" text:class-names="" text:cond-style-name=""><text:span text:style-name="a954" text:class-names="">· <text:s text:c="1"/></text:span><text:span text:style-name="a955" text:class-names="">Description</text:span><text:span text:style-name="a956" text:class-names="">: Vehicle type used (motorcycle, scooter, etc.).</text:span></text:p>
              </text:list-item>
            </text:list>
            <text:list text:style-name="a963">
              <text:list-item>
                <text:p text:style-name="a962" text:class-names="" text:cond-style-name=""><text:span text:style-name="a959" text:class-names="">· <text:s text:c="1"/></text:span><text:span text:style-name="a960" text:class-names="">Issues</text:span><text:span text:style-name="a961" text:class-names="">: No nulls.</text:span></text:p>
              </text:list-item>
            </text:list>
            <text:list text:style-name="a968">
              <text:list-item>
                <text:p text:style-name="a967" text:class-names="" text:cond-style-name=""><text:span text:style-name="a964" text:class-names="">· <text:s text:c="1"/></text:span><text:span text:style-name="a965" text:class-names="">Handling</text:span><text:span text:style-name="a966" text:class-names="">: Standardized text formatting.</text:span></text:p>
              </text:list-item>
            </text:list>
            <text:list text:style-name="a973">
              <text:list-item>
                <text:p text:style-name="a972" text:class-names="" text:cond-style-name=""><text:span text:style-name="a969" text:class-names="">· <text:s text:c="1"/></text:span><text:span text:style-name="a970" text:class-names="">Impact</text:span><text:span text:style-name="a971" text:class-names="">: Compared delivery times between vehicles.</text:span></text:p>
              </text:list-item>
            </text:list>
            <text:list text:style-name="a976">
              <text:list-item>
                <text:p text:style-name="a975" text:class-names="" text:cond-style-name=""><text:span text:style-name="a974" text:class-names="">Area:</text:span></text:p>
              </text:list-item>
            </text:list>
            <text:list text:style-name="a981">
              <text:list-item>
                <text:p text:style-name="a980" text:class-names="" text:cond-style-name=""><text:span text:style-name="a977" text:class-names="">·<text:s text:c="1"/></text:span><text:span text:style-name="a978" text:class-names="">Description</text:span><text:span text:style-name="a979" text:class-names="">: Type of delivery area (Urban, Semi-Urban, Metropolitan).</text:span></text:p>
              </text:list-item>
            </text:list>
            <text:list text:style-name="a986">
              <text:list-item>
                <text:p text:style-name="a985" text:class-names="" text:cond-style-name=""><text:span text:style-name="a982" text:class-names="">·<text:s text:c="1"/></text:span><text:span text:style-name="a983" text:class-names="">Issues</text:span><text:span text:style-name="a984" text:class-names="">: Typo in “Metropolitian” → corrected to “Metropolitan”.</text:span></text:p>
              </text:list-item>
            </text:list>
            <text:list text:style-name="a991">
              <text:list-item>
                <text:p text:style-name="a990" text:class-names="" text:cond-style-name=""><text:span text:style-name="a987" text:class-names="">·<text:s text:c="1"/></text:span><text:span text:style-name="a988" text:class-names="">Handling</text:span><text:span text:style-name="a989" text:class-names="">: Standardized category names.</text:span></text:p>
              </text:list-item>
            </text:list>
            <text:list text:style-name="a996">
              <text:list-item>
                <text:p text:style-name="a995" text:class-names="" text:cond-style-name=""><text:span text:style-name="a992" text:class-names="">·<text:s text:c="1"/></text:span><text:span text:style-name="a993" text:class-names="">Impact</text:span><text:span text:style-name="a994" text:class-names="">: Used to compare delivery speed in different regions.</text:span></text:p>
              </text:list-item>
            </text:list>
            <text:list text:style-name="a999">
              <text:list-item>
                <text:p text:style-name="a998" text:class-names="" text:cond-style-name=""><text:span text:style-name="a997" text:class-names="">Delivery_Time:</text:span></text:p>
              </text:list-item>
            </text:list>
            <text:list text:style-name="a1004">
              <text:list-item>
                <text:p text:style-name="a1003" text:class-names="" text:cond-style-name=""><text:span text:style-name="a1000" text:class-names="">·<text:s text:c="1"/></text:span><text:span text:style-name="a1001" text:class-names="">Description</text:span><text:span text:style-name="a1002" text:class-names="">: Actual delivery duration in minutes.</text:span></text:p>
              </text:list-item>
            </text:list>
            <text:list text:style-name="a1009">
              <text:list-item>
                <text:p text:style-name="a1008" text:class-names="" text:cond-style-name=""><text:span text:style-name="a1005" text:class-names="">·<text:s text:c="1"/></text:span><text:span text:style-name="a1006" text:class-names="">Issues</text:span><text:span text:style-name="a1007" text:class-names="">: Possible extreme outliers (too small or too high).</text:span></text:p>
              </text:list-item>
            </text:list>
            <text:list text:style-name="a1014">
              <text:list-item>
                <text:p text:style-name="a1013" text:class-names="" text:cond-style-name=""><text:span text:style-name="a1010" text:class-names="">·<text:s text:c="1"/></text:span><text:span text:style-name="a1011" text:class-names="">Handling</text:span><text:span text:style-name="a1012" text:class-names="">: Outliers capped based on IQR method.</text:span></text:p>
              </text:list-item>
            </text:list>
            <text:list text:style-name="a1019">
              <text:list-item>
                <text:p text:style-name="a1018" text:class-names="" text:cond-style-name=""><text:span text:style-name="a1015" text:class-names="">·<text:s text:c="1"/></text:span><text:span text:style-name="a1016" text:class-names="">Impact</text:span><text:span text:style-name="a1017" text:class-names="">: Provided reliable analysis of delivery efficiency.</text:span></text:p>
              </text:list-item>
            </text:list>
            <text:list text:style-name="a1022">
              <text:list-item>
                <text:p text:style-name="a1021" text:class-names="" text:cond-style-name=""><text:span text:style-name="a1020" text:class-names="">Category:</text:span></text:p>
              </text:list-item>
            </text:list>
            <text:list text:style-name="a1027">
              <text:list-item>
                <text:p text:style-name="a1026" text:class-names="" text:cond-style-name=""><text:span text:style-name="a1023" text:class-names="">·<text:s text:c="1"/></text:span><text:span text:style-name="a1024" text:class-names="">Description</text:span><text:span text:style-name="a1025" text:class-names="">: Type of product ordered (Clothing, Electronics, etc.).</text:span></text:p>
              </text:list-item>
            </text:list>
            <text:list text:style-name="a1032">
              <text:list-item>
                <text:p text:style-name="a1031" text:class-names="" text:cond-style-name=""><text:span text:style-name="a1028" text:class-names="">·<text:s text:c="1"/></text:span><text:span text:style-name="a1029" text:class-names="">Issues</text:span><text:span text:style-name="a1030" text:class-names="">: No nulls. Some categories very small in count.</text:span></text:p>
              </text:list-item>
            </text:list>
            <text:list text:style-name="a1037">
              <text:list-item>
                <text:p text:style-name="a1036" text:class-names="" text:cond-style-name=""><text:span text:style-name="a1033" text:class-names="">·<text:s text:c="1"/></text:span><text:span text:style-name="a1034" text:class-names="">Handling</text:span><text:span text:style-name="a1035" text:class-names="">: Kept all, but grouped very rare categories into “Other”.</text:span></text:p>
              </text:list-item>
            </text:list>
            <text:list text:style-name="a1042">
              <text:list-item>
                <text:p text:style-name="a1041" text:class-names="" text:cond-style-name=""><text:span text:style-name="a1038" text:class-names="">·<text:s text:c="1"/></text:span><text:span text:style-name="a1039" text:class-names="">Impact</text:span><text:span text:style-name="a1040" text:class-names="">: Helped analyze if product type affects delivery time.</text:span></text:p>
              </text:list-item>
            </text:list>
          </draw:text-box>
          <svg:title/>
          <svg:desc/>
        </draw:frame>
      </draw:page>
      <draw:page draw:name="Slide6" draw:style-name="a1044" draw:master-page-name="Master1-Layout2-obj-Title-and-Content" presentation:presentation-page-layout-name="Master1-PPL2" draw:id="Slide-261">
        <draw:custom-shape svg:x="0in" svg:y="0in" svg:width="13.33333in" svg:height="7.5in" draw:id="id91" draw:style-name="a1047" draw:name="Rectangle 10">
          <svg:title/>
          <svg:desc/>
          <text:p text:style-name="a1046" text:class-names="" text:cond-style-name=""><text:span text:style-name="a1045" text:class-names=""/></text:p>
          <draw:enhanced-geometry xmlns:dr3d="urn:oasis:names:tc:opendocument:xmlns:dr3d:1.0" draw:type="non-primitive" svg:viewBox="0 0 21600 21600" draw:enhanced-path="M 0 0 L 21600 0 21600 21600 0 21600 Z N"/>
        </draw:custom-shape>
        <draw:frame draw:id="id92" presentation:style-name="a1052" draw:name="Title 1" svg:x="0.67222in" svg:y="0.6in" svg:width="5.227in" svg:height="2.26127in" presentation:class="title" presentation:placeholder="false">
          <draw:text-box>
            <text:p text:style-name="a1051" text:class-names="" text:cond-style-name=""><text:span text:style-name="a1048" text:class-names="">Data Cleaning and Preprocessing<text:s text:c="1"/></text:span><text:span text:style-name="a1049" text:class-names="">:</text:span><text:span text:style-name="a1050" text:class-names=""><text:line-break/></text:span></text:p>
          </draw:text-box>
          <svg:title/>
          <svg:desc/>
        </draw:frame>
        <draw:frame draw:id="id93" draw:style-name="a1053" draw:name="Graphic 7" svg:x="0.8in" svg:y="3.2549in" svg:width="3.6451in" svg:height="3.6451in" style:rel-width="scale" style:rel-height="scale">
          <draw:image xlink:href="media/image5.svg" xlink:type="simple" xlink:show="embed" xlink:actuate="onLoad"/>
          <svg:title/>
          <svg:desc>Home</svg:desc>
        </draw:frame>
        <draw:frame draw:id="id94" presentation:style-name="a1085" draw:name="Rectangle 1" svg:x="6.59509in" svg:y="0.6in" svg:width="6.06602in" svg:height="6.3in" presentation:class="outline" presentation:placeholder="false">
          <draw:text-box>
            <text:list text:style-name="a1056">
              <text:list-item>
                <text:p text:style-name="a1055" text:class-names="" text:cond-style-name=""><text:span text:style-name="a1054" text:class-names="">1. Column Renaming:</text:span></text:p>
              </text:list-item>
            </text:list>
            <text:list text:style-name="a1060">
              <text:list-item>
                <text:p text:style-name="a1059" text:class-names="" text:cond-style-name=""><text:span text:style-name="a1057" text:class-names="">Problem</text:span><text:span text:style-name="a1058" text:class-names="">:</text:span></text:p>
              </text:list-item>
            </text:list>
            <text:list text:style-name="a1065">
              <text:list-item>
                <text:p text:style-name="a1064" text:class-names="" text:cond-style-name=""><text:span text:style-name="a1061" text:class-names="">· The column<text:s text:c="1"/></text:span><text:span text:style-name="a1062" text:class-names="">Agent_Rating</text:span><text:span text:style-name="a1063" text:class-names=""><text:s text:c="1"/>was not fully descriptive</text:span></text:p>
              </text:list-item>
            </text:list>
            <text:list text:style-name="a1069">
              <text:list-item>
                <text:p text:style-name="a1068" text:class-names="" text:cond-style-name=""><text:span text:style-name="a1066" text:class-names="">Solution</text:span><text:span text:style-name="a1067" text:class-names="">:</text:span></text:p>
              </text:list-item>
            </text:list>
            <text:list text:style-name="a1074">
              <text:list-item>
                <text:p text:style-name="a1073" text:class-names="" text:cond-style-name=""><text:span text:style-name="a1070" text:class-names="">· Renamed to<text:s text:c="1"/></text:span><text:span text:style-name="a1071" text:class-names="">Order_Rating</text:span><text:span text:style-name="a1072" text:class-names=""><text:s text:c="1"/>for clarity</text:span></text:p>
              </text:list-item>
            </text:list>
            <text:list text:style-name="a1078">
              <text:list-item>
                <text:p text:style-name="a1077" text:class-names="" text:cond-style-name=""><text:span text:style-name="a1075" text:class-names="">Impact</text:span><text:span text:style-name="a1076" text:class-names="">:</text:span></text:p>
              </text:list-item>
            </text:list>
            <text:list text:style-name="a1081">
              <text:list-item>
                <text:p text:style-name="a1080" text:class-names="" text:cond-style-name=""><text:span text:style-name="a1079" text:class-names="">· Clearer understanding that rating refers to the order</text:span></text:p>
              </text:list-item>
            </text:list>
            <text:list text:style-name="a1084">
              <text:list-item>
                <text:p text:style-name="a1083" text:class-names="" text:cond-style-name=""><text:span text:style-name="a1082" text:class-names=""/></text:p>
              </text:list-item>
            </text:list>
          </draw:text-box>
          <svg:title/>
          <svg:desc/>
        </draw:frame>
      </draw:page>
      <draw:page draw:name="Slide8" draw:style-name="a1086" draw:master-page-name="Master1-Layout2-obj-Title-and-Content" presentation:presentation-page-layout-name="Master1-PPL2" draw:id="Slide-263">
        <draw:custom-shape svg:x="0in" svg:y="0in" svg:width="13.33333in" svg:height="7.5in" draw:id="id95" draw:style-name="a1089" draw:name="Rectangle 8">
          <svg:title/>
          <svg:desc/>
          <text:p text:style-name="a1088" text:class-names="" text:cond-style-name=""><text:span text:style-name="a1087" text:class-names=""/></text:p>
          <draw:enhanced-geometry xmlns:dr3d="urn:oasis:names:tc:opendocument:xmlns:dr3d:1.0" draw:type="non-primitive" svg:viewBox="0 0 21600 21600" draw:enhanced-path="M 0 0 L 21600 0 21600 21600 0 21600 Z N"/>
        </draw:custom-shape>
        <draw:frame draw:id="id96" presentation:style-name="a1092" draw:name="Title 1" svg:x="0.67222in" svg:y="0.6in" svg:width="4.35in" svg:height="6.25507in" presentation:class="title" presentation:placeholder="false">
          <draw:text-box>
            <text:p text:style-name="a1091" text:class-names="" text:cond-style-name=""><text:span text:style-name="a1090" text:class-names="">Handling Missing Values:<text:line-break/></text:span></text:p>
          </draw:text-box>
          <svg:title/>
          <svg:desc/>
        </draw:frame>
        <draw:frame draw:id="id97" presentation:style-name="a1176" draw:name="Rectangle 1" svg:x="5.89189in" svg:y="0.6in" svg:width="6.76923in" svg:height="6.41in" presentation:class="outline" presentation:placeholder="false">
          <draw:text-box>
            <text:list text:style-name="a1095">
              <text:list-item>
                <text:p text:style-name="a1094" text:class-names="" text:cond-style-name=""><text:span text:style-name="a1093" text:class-names=""><text:s text:c="1"/>Order_Rating:</text:span></text:p>
              </text:list-item>
            </text:list>
            <text:list text:style-name="a1099">
              <text:list-item>
                <text:p text:style-name="a1098" text:class-names="" text:cond-style-name=""><text:span text:style-name="a1096" text:class-names="">Problem</text:span><text:span text:style-name="a1097" text:class-names="">:</text:span></text:p>
              </text:list-item>
            </text:list>
            <text:list text:style-name="a1102">
              <text:list-item>
                <text:p text:style-name="a1101" text:class-names="" text:cond-style-name=""><text:span text:style-name="a1100" text:class-names="">· <text:s text:c="2"/>Missing ratings</text:span></text:p>
              </text:list-item>
            </text:list>
            <text:list text:style-name="a1106">
              <text:list-item>
                <text:p text:style-name="a1105" text:class-names="" text:cond-style-name=""><text:span text:style-name="a1103" text:class-names="">Solution</text:span><text:span text:style-name="a1104" text:class-names="">:</text:span></text:p>
              </text:list-item>
            </text:list>
            <text:list text:style-name="a1111">
              <text:list-item>
                <text:p text:style-name="a1110" text:class-names="" text:cond-style-name=""><text:span text:style-name="a1107" text:class-names=""><text:s text:c="10"/>· Filled with the<text:s text:c="1"/></text:span><text:span text:style-name="a1108" text:class-names="">median rating</text:span><text:span text:style-name="a1109" text:class-names=""><text:s text:c="1"/></text:span></text:p>
              </text:list-item>
            </text:list>
            <text:list text:style-name="a1115">
              <text:list-item>
                <text:p text:style-name="a1114" text:class-names="" text:cond-style-name=""><text:span text:style-name="a1112" text:class-names="">Impact</text:span><text:span text:style-name="a1113" text:class-names="">:</text:span></text:p>
              </text:list-item>
            </text:list>
            <text:list text:style-name="a1118">
              <text:list-item>
                <text:p text:style-name="a1117" text:class-names="" text:cond-style-name=""><text:span text:style-name="a1116" text:class-names=""><text:s text:c="9"/>· Prevented bias and preserved data distribution</text:span></text:p>
              </text:list-item>
            </text:list>
            <text:list text:style-name="a1122">
              <text:list-item>
                <text:p text:style-name="a1121" text:class-names="" text:cond-style-name=""><text:span text:style-name="a1119" text:class-names="">Weather:</text:span><text:span text:style-name="a1120" text:class-names=""/></text:p>
              </text:list-item>
            </text:list>
            <text:list text:style-name="a1126">
              <text:list-item>
                <text:p text:style-name="a1125" text:class-names="" text:cond-style-name=""><text:span text:style-name="a1123" text:class-names="">Problem</text:span><text:span text:style-name="a1124" text:class-names="">: Missing weather conditions.</text:span></text:p>
              </text:list-item>
            </text:list>
            <text:list text:style-name="a1132">
              <text:list-item>
                <text:p text:style-name="a1131" text:class-names="" text:cond-style-name=""><text:span text:style-name="a1127" text:class-names="">Solution</text:span><text:span text:style-name="a1128" text:class-names="">: Filled with the<text:s text:c="1"/></text:span><text:span text:style-name="a1129" text:class-names="">mode value (“Fog”)</text:span><text:span text:style-name="a1130" text:class-names="">.</text:span></text:p>
              </text:list-item>
            </text:list>
            <text:list text:style-name="a1136">
              <text:list-item>
                <text:p text:style-name="a1135" text:class-names="" text:cond-style-name=""><text:span text:style-name="a1133" text:class-names="">Impact</text:span><text:span text:style-name="a1134" text:class-names="">: Maintained realistic category distribution.</text:span></text:p>
              </text:list-item>
            </text:list>
            <text:list text:style-name="a1139">
              <text:list-item>
                <text:p text:style-name="a1138" text:class-names="" text:cond-style-name=""><text:span text:style-name="a1137" text:class-names="">Traffic:</text:span></text:p>
              </text:list-item>
            </text:list>
            <text:list text:style-name="a1145">
              <text:list-item>
                <text:p text:style-name="a1144" text:class-names="" text:cond-style-name=""><text:span text:style-name="a1140" text:class-names="">Problem</text:span><text:span text:style-name="a1141" text:class-names="">: Some values stored as the string<text:s text:c="1"/></text:span><text:span text:style-name="a1142" text:class-names="">'NaN '</text:span><text:span text:style-name="a1143" text:class-names="">.</text:span></text:p>
              </text:list-item>
            </text:list>
            <text:list text:style-name="a1151">
              <text:list-item>
                <text:p text:style-name="a1150" text:class-names="" text:cond-style-name=""><text:span text:style-name="a1146" text:class-names="">Solution</text:span><text:span text:style-name="a1147" text:class-names="">: Replaced with actual<text:s text:c="1"/></text:span><text:span text:style-name="a1148" text:class-names="">NaN</text:span><text:span text:style-name="a1149" text:class-names="">.</text:span></text:p>
              </text:list-item>
            </text:list>
            <text:list text:style-name="a1155">
              <text:list-item>
                <text:p text:style-name="a1154" text:class-names="" text:cond-style-name=""><text:span text:style-name="a1152" text:class-names="">Impact</text:span><text:span text:style-name="a1153" text:class-names="">: Ensured accurate handling of missing values.</text:span></text:p>
              </text:list-item>
            </text:list>
            <text:list text:style-name="a1159">
              <text:list-item>
                <text:p text:style-name="a1158" text:class-names="" text:cond-style-name=""><text:span text:style-name="a1156" text:class-names="">Order_Time</text:span><text:span text:style-name="a1157" text:class-names=""/></text:p>
              </text:list-item>
            </text:list>
            <text:list text:style-name="a1165">
              <text:list-item>
                <text:p text:style-name="a1164" text:class-names="" text:cond-style-name=""><text:span text:style-name="a1160" text:class-names="">Problem</text:span><text:span text:style-name="a1161" text:class-names="">: Invalid placeholders such as<text:s text:c="1"/></text:span><text:span text:style-name="a1162" text:class-names="">'NaN'</text:span><text:span text:style-name="a1163" text:class-names=""><text:s text:c="1"/>text.</text:span></text:p>
              </text:list-item>
            </text:list>
            <text:list text:style-name="a1171">
              <text:list-item>
                <text:p text:style-name="a1170" text:class-names="" text:cond-style-name=""><text:span text:style-name="a1166" text:class-names="">Solution</text:span><text:span text:style-name="a1167" text:class-names="">: Converted them to proper<text:s text:c="1"/></text:span><text:span text:style-name="a1168" text:class-names="">NaN</text:span><text:span text:style-name="a1169" text:class-names="">.</text:span></text:p>
              </text:list-item>
            </text:list>
            <text:list text:style-name="a1175">
              <text:list-item>
                <text:p text:style-name="a1174" text:class-names="" text:cond-style-name=""><text:span text:style-name="a1172" text:class-names="">Impact</text:span><text:span text:style-name="a1173" text:class-names="">: Cleaned time column for later datetime conversion. <text:s text:c="7"/></text:span></text:p>
              </text:list-item>
            </text:list>
          </draw:text-box>
          <svg:title/>
          <svg:desc/>
        </draw:frame>
      </draw:page>
      <draw:page draw:name="Slide9" draw:style-name="a1177" draw:master-page-name="Master1-Layout2-obj-Title-and-Content" presentation:presentation-page-layout-name="Master1-PPL2" draw:id="Slide-264">
        <draw:custom-shape svg:x="0in" svg:y="0in" svg:width="13.33333in" svg:height="7.5in" draw:id="id98" draw:style-name="a1180" draw:name="Rectangle 9">
          <svg:title/>
          <svg:desc/>
          <text:p text:style-name="a1179" text:class-names="" text:cond-style-name=""><text:span text:style-name="a1178" text:class-names=""/></text:p>
          <draw:enhanced-geometry xmlns:dr3d="urn:oasis:names:tc:opendocument:xmlns:dr3d:1.0" draw:type="non-primitive" svg:viewBox="0 0 21600 21600" draw:enhanced-path="M 0 0 L 21600 0 21600 21600 0 21600 Z N"/>
        </draw:custom-shape>
        <draw:frame draw:id="id99" presentation:style-name="a1183" draw:name="Title 1" svg:x="0.77094in" svg:y="0.49873in" svg:width="4.35in" svg:height="6.25507in" presentation:class="title" presentation:placeholder="false">
          <draw:text-box>
            <text:p text:style-name="a1182" text:class-names="" text:cond-style-name=""><text:span text:style-name="a1181" text:class-names="">Outlier Detection &amp; Treatment:<text:line-break/></text:span></text:p>
          </draw:text-box>
          <svg:title/>
          <svg:desc/>
        </draw:frame>
        <draw:frame draw:id="id100" presentation:style-name="a1224" draw:name="Content Placeholder 2" svg:x="5.89189in" svg:y="0.6in" svg:width="6.76923in" svg:height="6.41in" presentation:class="outline" presentation:placeholder="false">
          <draw:text-box>
            <text:list text:style-name="a1187">
              <text:list-item>
                <text:p text:style-name="a1186" text:class-names="" text:cond-style-name=""><text:span text:style-name="a1184" text:class-names="">Agent_Age</text:span><text:span text:style-name="a1185" text:class-names=""/></text:p>
              </text:list-item>
            </text:list>
            <text:list text:style-name="a1190">
              <text:list-item>
                <text:p text:style-name="a1189" text:class-names="" text:cond-style-name=""><text:span text:style-name="a1188" text:class-names="">Checked distribution → detected possible outliers (e.g., very young or very old ages).</text:span></text:p>
              </text:list-item>
            </text:list>
            <text:list text:style-name="a1194">
              <text:list-item>
                <text:p text:style-name="a1193" text:class-names="" text:cond-style-name=""><text:span text:style-name="a1191" text:class-names="">Order_Rating</text:span><text:span text:style-name="a1192" text:class-names=""/></text:p>
              </text:list-item>
            </text:list>
            <text:list text:style-name="a1197">
              <text:list-item>
                <text:p text:style-name="a1196" text:class-names="" text:cond-style-name=""><text:span text:style-name="a1195" text:class-names="">Checked distribution → ensured values within valid range (1–5).</text:span></text:p>
              </text:list-item>
            </text:list>
            <text:list text:style-name="a1201">
              <text:list-item>
                <text:p text:style-name="a1200" text:class-names="" text:cond-style-name=""><text:span text:style-name="a1198" text:class-names="">Delivery_Time</text:span><text:span text:style-name="a1199" text:class-names=""/></text:p>
              </text:list-item>
            </text:list>
            <text:list text:style-name="a1204">
              <text:list-item>
                <text:p text:style-name="a1203" text:class-names="" text:cond-style-name=""><text:span text:style-name="a1202" text:class-names="">Distribution examined for extreme values.</text:span></text:p>
              </text:list-item>
            </text:list>
            <text:list text:style-name="a1208">
              <text:list-item>
                <text:p text:style-name="a1207" text:class-names="" text:cond-style-name=""><text:span text:style-name="a1205" text:class-names="">Distance_km</text:span><text:span text:style-name="a1206" text:class-names=""/></text:p>
              </text:list-item>
            </text:list>
            <text:list text:style-name="a1211">
              <text:list-item>
                <text:p text:style-name="a1210" text:class-names="" text:cond-style-name=""><text:span text:style-name="a1209" text:class-names="">Used boxplot + IQR method.</text:span></text:p>
              </text:list-item>
            </text:list>
            <text:list text:style-name="a1216">
              <text:list-item>
                <text:p text:style-name="a1215" text:class-names="" text:cond-style-name=""><text:span text:style-name="a1212" text:class-names="">Filtered rows outside<text:s text:c="1"/></text:span><text:span text:style-name="a1213" text:class-names="">[lower_bound, upper_bound]</text:span><text:span text:style-name="a1214" text:class-names="">.</text:span></text:p>
              </text:list-item>
            </text:list>
            <text:list text:style-name="a1220">
              <text:list-item>
                <text:p text:style-name="a1219" text:class-names="" text:cond-style-name=""><text:span text:style-name="a1217" text:class-names="">Impact</text:span><text:span text:style-name="a1218" text:class-names="">: Outliers removed → improved accuracy of averages and predictive modeling.</text:span></text:p>
              </text:list-item>
            </text:list>
            <text:list text:style-name="a1223">
              <text:list-item>
                <text:p text:style-name="a1222" text:class-names="" text:cond-style-name=""><text:span text:style-name="a1221" text:class-names=""/></text:p>
              </text:list-item>
            </text:list>
          </draw:text-box>
          <svg:title/>
          <svg:desc/>
        </draw:frame>
      </draw:page>
      <draw:page draw:name="Slide13" draw:style-name="a1225" draw:master-page-name="Master1-Layout5-twoTxTwoObj-Comparison" presentation:presentation-page-layout-name="Master1-PPL5" draw:id="Slide-268">
        <draw:frame draw:id="id101" presentation:style-name="a1228" draw:name="Title 1" svg:x="0.66667in" svg:y="0.59864in" svg:width="11.75174in" svg:height="1.25032in" presentation:class="title" presentation:placeholder="false">
          <draw:text-box>
            <text:p text:style-name="a1227" text:class-names="" text:cond-style-name=""><text:span text:style-name="a1226" text:class-names="">Outlier Detection &amp; Treatment:</text:span></text:p>
          </draw:text-box>
          <svg:title/>
          <svg:desc/>
        </draw:frame>
        <draw:frame draw:id="id102" presentation:style-name="a1232" draw:name="Text Placeholder 2" svg:x="0.66667in" svg:y="1.84354in" svg:width="5.64062in" svg:height="0.61224in" presentation:class="outline" presentation:placeholder="false">
          <draw:text-box>
            <text:list text:style-name="a1231">
              <text:list-item>
                <text:p text:style-name="a1230" text:class-names="" text:cond-style-name=""><text:span text:style-name="a1229" text:class-names="">Check outliers in distance<text:s text:c="1"/></text:span></text:p>
              </text:list-item>
            </text:list>
          </draw:text-box>
          <svg:title/>
          <svg:desc/>
        </draw:frame>
        <draw:frame draw:id="id103" presentation:style-name="a1236" draw:name="Text Placeholder 4" svg:x="6.75in" svg:y="1.84354in" svg:width="5.6684in" svg:height="0.61224in" presentation:class="outline" presentation:placeholder="false">
          <draw:text-box>
            <text:list text:style-name="a1235">
              <text:list-item>
                <text:p text:style-name="a1234" text:class-names="" text:cond-style-name=""><text:span text:style-name="a1233" text:class-names="">After handle outlier<text:s text:c="1"/></text:span></text:p>
              </text:list-item>
            </text:list>
          </draw:text-box>
          <svg:title/>
          <svg:desc/>
        </draw:frame>
        <draw:frame draw:id="id104" presentation:style-name="a1237" draw:name="Content Placeholder 13" svg:x="7.08527in" svg:y="2.61111in" svg:width="4.99785in" svg:height="4.11632in" style:rel-width="scale" style:rel-height="scale" presentation:class="graphic" presentation:placeholder="false">
          <draw:image xlink:href="media/image6.png" xlink:type="simple" xlink:show="embed" xlink:actuate="onLoad"/>
          <svg:title/>
          <svg:desc>A blue rectangular object with black lines

AI-generated content may be incorrect.</svg:desc>
        </draw:frame>
        <draw:frame draw:id="id105" presentation:style-name="a1238" draw:name="Content Placeholder 11" svg:x="0.88841in" svg:y="2.61111in" svg:width="5.19714in" svg:height="4.11632in" style:rel-width="scale" style:rel-height="scale" presentation:class="graphic" presentation:placeholder="false">
          <draw:image xlink:href="media/image7.png" xlink:type="simple" xlink:show="embed" xlink:actuate="onLoad"/>
          <svg:title/>
          <svg:desc>A graph of a distance

AI-generated content may be incorrect.</svg:desc>
        </draw:frame>
      </draw:page>
      <draw:page draw:name="Slide10" draw:style-name="a1239" draw:master-page-name="Master1-Layout2-obj-Title-and-Content" presentation:presentation-page-layout-name="Master1-PPL2" draw:id="Slide-265">
        <draw:custom-shape svg:x="0in" svg:y="0in" svg:width="13.33333in" svg:height="7.5in" draw:id="id106" draw:style-name="a1242" draw:name="Rectangle 17">
          <svg:title/>
          <svg:desc/>
          <text:p text:style-name="a1241" text:class-names="" text:cond-style-name=""><text:span text:style-name="a1240" text:class-names=""/></text:p>
          <draw:enhanced-geometry xmlns:dr3d="urn:oasis:names:tc:opendocument:xmlns:dr3d:1.0" draw:type="non-primitive" svg:viewBox="0 0 21600 21600" draw:enhanced-path="M 0 0 L 21600 0 21600 21600 0 21600 Z N"/>
        </draw:custom-shape>
        <draw:frame draw:id="id107" presentation:style-name="a1245" draw:name="Title 1" svg:x="0.67in" svg:y="0.6in" svg:width="4in" svg:height="1.41554in" presentation:class="title" presentation:placeholder="false">
          <draw:text-box>
            <text:p text:style-name="a1244" text:class-names="" text:cond-style-name=""><text:span text:style-name="a1243" text:class-names="">. Feature Engineering:</text:span></text:p>
          </draw:text-box>
          <svg:title/>
          <svg:desc/>
        </draw:frame>
        <draw:frame draw:id="id108" draw:style-name="a1246" draw:name="Picture 12" svg:x="0.79547in" svg:y="2.19608in" svg:width="3.82143in" svg:height="4.70392in" style:rel-width="scale" style:rel-height="scale">
          <draw:image xlink:href="media/image8.jpeg" xlink:type="simple" xlink:show="embed" xlink:actuate="onLoad"/>
          <svg:title/>
          <svg:desc>The sky with some storm clouds</svg:desc>
        </draw:frame>
        <draw:frame draw:id="id109" presentation:style-name="a1345" draw:name="Rectangle 1" svg:x="5.48321in" svg:y="0.6in" svg:width="7.17567in" svg:height="6.3in" presentation:class="outline" presentation:placeholder="false">
          <draw:text-box>
            <text:list text:style-name="a1250">
              <text:list-item>
                <text:p text:style-name="a1249" text:class-names="" text:cond-style-name=""><text:span text:style-name="a1247" text:class-names="">Weather_Category:</text:span><text:span text:style-name="a1248" text:class-names=""/></text:p>
              </text:list-item>
            </text:list>
            <text:list text:style-name="a1253">
              <text:list-item>
                <text:p text:style-name="a1252" text:class-names="" text:cond-style-name=""><text:span text:style-name="a1251" text:class-names="">Created a new column grouping weather into categories:</text:span></text:p>
              </text:list-item>
            </text:list>
            <text:list text:style-name="a1257">
              <text:list-item>
                <text:p text:style-name="a1256" text:class-names="" text:cond-style-name=""><text:span text:style-name="a1254" text:class-names="">Good_Weather</text:span><text:span text:style-name="a1255" text:class-names="">: Sunny</text:span></text:p>
              </text:list-item>
            </text:list>
            <text:list text:style-name="a1261">
              <text:list-item>
                <text:p text:style-name="a1260" text:class-names="" text:cond-style-name=""><text:span text:style-name="a1258" text:class-names="">Bad_Weather</text:span><text:span text:style-name="a1259" text:class-names="">: Cloudy, Windy, Fog</text:span></text:p>
              </text:list-item>
            </text:list>
            <text:list text:style-name="a1265">
              <text:list-item>
                <text:p text:style-name="a1264" text:class-names="" text:cond-style-name=""><text:span text:style-name="a1262" text:class-names="">Extra_Bad_Weather</text:span><text:span text:style-name="a1263" text:class-names="">: Stormy, Sandstorms</text:span></text:p>
              </text:list-item>
            </text:list>
            <text:list text:style-name="a1269">
              <text:list-item>
                <text:p text:style-name="a1268" text:class-names="" text:cond-style-name=""><text:span text:style-name="a1266" text:class-names="">Impact</text:span><text:span text:style-name="a1267" text:class-names="">: Simplified weather impact analysis on delivery.</text:span></text:p>
              </text:list-item>
            </text:list>
            <text:list text:style-name="a1273">
              <text:list-item>
                <text:p text:style-name="a1272" text:class-names="" text:cond-style-name=""><text:span text:style-name="a1270" text:class-names="">Order_DateTime:</text:span><text:span text:style-name="a1271" text:class-names=""/></text:p>
              </text:list-item>
            </text:list>
            <text:list text:style-name="a1281">
              <text:list-item>
                <text:p text:style-name="a1280" text:class-names="" text:cond-style-name=""><text:span text:style-name="a1274" text:class-names="">Combined<text:s text:c="1"/></text:span><text:span text:style-name="a1275" text:class-names="">Order_Date</text:span><text:span text:style-name="a1276" text:class-names=""><text:s text:c="1"/>and<text:s text:c="1"/></text:span><text:span text:style-name="a1277" text:class-names="">Order_Time</text:span><text:span text:style-name="a1278" text:class-names=""><text:s text:c="1"/>into a single datetime column.</text:span><text:span text:style-name="a1279" text:class-names=""/></text:p>
              </text:list-item>
            </text:list>
            <text:list text:style-name="a1285">
              <text:list-item>
                <text:p text:style-name="a1284" text:class-names="" text:cond-style-name=""><text:span text:style-name="a1282" text:class-names="">Impact</text:span><text:span text:style-name="a1283" text:class-names="">: Enabled time-based calculations (waiting time, delays, peak hours).</text:span></text:p>
              </text:list-item>
            </text:list>
            <text:list text:style-name="a1288">
              <text:list-item>
                <text:p text:style-name="a1287" text:class-names="" text:cond-style-name=""><text:span text:style-name="a1286" text:class-names="">Order_Time_Category:</text:span></text:p>
              </text:list-item>
            </text:list>
            <text:list text:style-name="a1292">
              <text:list-item>
                <text:p text:style-name="a1291" text:class-names="" text:cond-style-name=""><text:span text:style-name="a1289" text:class-names="">Created a new column grouping order_time into categories:</text:span><text:span text:style-name="a1290" text:class-names="">(Morning, Afternoon, Evening, Night)</text:span></text:p>
              </text:list-item>
            </text:list>
            <text:list text:style-name="a1297">
              <text:list-item>
                <text:p text:style-name="a1296" text:class-names="" text:cond-style-name=""><text:span text:style-name="a1293" text:class-names="">Area_Category :</text:span><text:span text:style-name="a1294" text:class-names=""><text:s text:c="1"/>Created a new column grouping area into</text:span><text:span text:style-name="a1295" text:class-names=""/></text:p>
              </text:list-item>
            </text:list>
            <text:list text:style-name="a1302">
              <text:list-item>
                <text:p text:style-name="a1301" text:class-names="" text:cond-style-name=""><text:span text:style-name="a1298" text:class-names="">Categories:(</text:span><text:span text:style-name="a1299" text:class-names="">Urban, Metropolitan,Other</text:span><text:span text:style-name="a1300" text:class-names="">)</text:span></text:p>
              </text:list-item>
            </text:list>
            <text:list text:style-name="a1308">
              <text:list-item>
                <text:p text:style-name="a1307" text:class-names="" text:cond-style-name=""><text:span text:style-name="a1303" text:class-names="">Distance_km</text:span><text:span text:style-name="a1304" text:class-names="">: Calculated using the<text:s text:c="1"/></text:span><text:span text:style-name="a1305" text:class-names="">Haversine formula</text:span><text:span text:style-name="a1306" text:class-names=""><text:s text:c="1"/>based on pickup and drop-off GPS coordinates.</text:span></text:p>
              </text:list-item>
            </text:list>
            <text:list text:style-name="a1312">
              <text:list-item>
                <text:p text:style-name="a1311" text:class-names="" text:cond-style-name=""><text:span text:style-name="a1309" text:class-names="">Speed_kmph</text:span><text:span text:style-name="a1310" text:class-names="">: Computed using the formula:</text:span></text:p>
              </text:list-item>
            </text:list>
            <text:list text:style-name="a1315">
              <text:list-item>
                <text:p text:style-name="a1314" text:class-names="" text:cond-style-name=""><text:span text:style-name="a1313" text:class-names="">Speed(km/h)=Distance_kmDelivery_Time(minutes)/60Speed (km/h) = \frac{Distance\_km}{Delivery\_Time (minutes) / 60}Speed(km/h)=Delivery_Time(minutes)/60Distance_km​<text:s text:c="1"/></text:span></text:p>
              </text:list-item>
            </text:list>
            <text:list text:style-name="a1318">
              <text:list-item>
                <text:p text:style-name="a1317" text:class-names="" text:cond-style-name=""><text:span text:style-name="a1316" text:class-names="">Final dataset now contains two additional columns:</text:span></text:p>
              </text:list-item>
            </text:list>
            <text:list text:style-name="a1322">
              <text:list-item>
                <text:p text:style-name="a1321" text:class-names="" text:cond-style-name=""><text:span text:style-name="a1319" text:class-names="">Distance_km</text:span><text:span text:style-name="a1320" text:class-names=""/></text:p>
              </text:list-item>
            </text:list>
            <text:list text:style-name="a1326">
              <text:list-item>
                <text:p text:style-name="a1325" text:class-names="" text:cond-style-name=""><text:span text:style-name="a1323" text:class-names="">Speed_kmph</text:span><text:span text:style-name="a1324" text:class-names=""/></text:p>
              </text:list-item>
            </text:list>
            <text:list text:style-name="a1329">
              <text:list-item>
                <text:p text:style-name="a1328" text:class-names="" text:cond-style-name=""><text:span text:style-name="a1327" text:class-names=""/></text:p>
              </text:list-item>
            </text:list>
            <text:list text:style-name="a1332">
              <text:list-item>
                <text:p text:style-name="a1331" text:class-names="" text:cond-style-name=""><text:span text:style-name="a1330" text:class-names=""/></text:p>
              </text:list-item>
            </text:list>
            <text:list text:style-name="a1335">
              <text:list-item>
                <text:p text:style-name="a1334" text:class-names="" text:cond-style-name=""><text:span text:style-name="a1333" text:class-names=""/></text:p>
              </text:list-item>
            </text:list>
            <text:list text:style-name="a1338">
              <text:list-item>
                <text:p text:style-name="a1337" text:class-names="" text:cond-style-name=""><text:span text:style-name="a1336" text:class-names=""/></text:p>
              </text:list-item>
            </text:list>
            <text:list text:style-name="a1341">
              <text:list-item>
                <text:p text:style-name="a1340" text:class-names="" text:cond-style-name=""><text:span text:style-name="a1339" text:class-names=""/></text:p>
              </text:list-item>
            </text:list>
            <text:list text:style-name="a1344">
              <text:list-item>
                <text:p text:style-name="a1343" text:class-names="" text:cond-style-name=""><text:span text:style-name="a1342" text:class-names=""/></text:p>
              </text:list-item>
            </text:list>
          </draw:text-box>
          <svg:title/>
          <svg:desc/>
        </draw:frame>
        <draw:custom-shape svg:x="0in" svg:y="-0.31135in" svg:width="0.20202in" svg:height="0.62269in" draw:id="id110" draw:style-name="a1350" draw:name="Rectangle 2">
          <svg:title/>
          <svg:desc/>
          <text:p text:style-name="a1347" text:class-names="" text:cond-style-name=""><text:span text:style-name="a1346" text:class-names=""/></text:p>
          <text:p text:style-name="a1349" text:class-names="" text:cond-style-name=""><text:span text:style-name="a1348" text:class-names=""/></text:p>
          <draw:enhanced-geometry xmlns:dr3d="urn:oasis:names:tc:opendocument:xmlns:dr3d:1.0" draw:type="non-primitive" svg:viewBox="0 0 21600 21600" draw:enhanced-path="M 0 0 L 21600 0 21600 21600 0 21600 Z N"/>
        </draw:custom-shape>
      </draw:page>
      <draw:page draw:name="Slide14" draw:style-name="a1351" draw:master-page-name="Master1-Layout5-twoTxTwoObj-Comparison" presentation:presentation-page-layout-name="Master1-PPL5" draw:id="Slide-269">
        <draw:frame draw:id="id111" presentation:style-name="a1355" draw:name="Title 1" svg:x="0.66667in" svg:y="0.59864in" svg:width="11.75174in" svg:height="1.25032in" presentation:class="title" presentation:placeholder="false">
          <draw:text-box>
            <text:p text:style-name="a1354" text:class-names="" text:cond-style-name=""><text:span text:style-name="a1352" text:class-names="">Visualization:<text:line-break/></text:span><text:span text:style-name="a1353" text:class-names=""/></text:p>
          </draw:text-box>
          <svg:title/>
          <svg:desc/>
        </draw:frame>
        <draw:frame draw:id="id112" presentation:style-name="a1356" draw:name="Content Placeholder 8" svg:x="0.66667in" svg:y="2.6701in" svg:width="5.64063in" svg:height="3.99834in" style:rel-width="scale" style:rel-height="scale" presentation:class="graphic" presentation:placeholder="false">
          <draw:image xlink:href="media/image9.png" xlink:type="simple" xlink:show="embed" xlink:actuate="onLoad"/>
          <svg:title/>
          <svg:desc>A graph showing different colors of the same color</svg:desc>
        </draw:frame>
        <draw:frame draw:id="id113" presentation:style-name="a1362" draw:name="Text Placeholder 4" svg:x="6.76582in" svg:y="1.34814in" svg:width="5.6684in" svg:height="0.61224in" presentation:class="outline" presentation:placeholder="false">
          <draw:text-box>
            <text:list text:style-name="a1361">
              <text:list-item>
                <text:p text:style-name="a1360" text:class-names="" text:cond-style-name=""><text:span text:style-name="a1357" text:class-names="">Correlation</text:span><text:span text:style-name="a1358" text:class-names=""><text:s text:c="1"/></text:span><text:span text:style-name="a1359" text:class-names="">between numerical column<text:s text:c="1"/></text:span></text:p>
              </text:list-item>
            </text:list>
          </draw:text-box>
          <svg:title/>
          <svg:desc/>
        </draw:frame>
        <draw:frame draw:id="id114" presentation:style-name="a1368" draw:name="Rectangle 1" svg:x="0.55274in" svg:y="1.84896in" svg:width="4.99343in" svg:height="0.53854in" presentation:class="outline" presentation:placeholder="false">
          <draw:text-box>
            <text:list text:style-name="a1367">
              <text:list-item>
                <text:p text:style-name="a1366" text:class-names="" text:cond-style-name=""><text:span text:style-name="a1363" text:class-names="">Average Speed by Weather</text:span><text:span text:style-name="a1364" text:class-names=""><text:s text:c="1"/></text:span><text:span text:style-name="a1365" text:class-names=""/></text:p>
              </text:list-item>
            </text:list>
          </draw:text-box>
          <svg:title/>
          <svg:desc/>
        </draw:frame>
        <draw:frame draw:id="id115" presentation:style-name="a1369" draw:name="Content Placeholder 14" svg:x="7.2699in" svg:y="2.61111in" svg:width="4.6286in" svg:height="4.11632in" style:rel-width="scale" style:rel-height="scale" presentation:class="graphic" presentation:placeholder="false">
          <draw:image xlink:href="media/image10.png" xlink:type="simple" xlink:show="embed" xlink:actuate="onLoad"/>
          <svg:title/>
          <svg:desc>A blue squares with white text

AI-generated content may be incorrect.</svg:desc>
        </draw:frame>
      </draw:page>
      <draw:page draw:name="Slide15" draw:style-name="a1370" draw:master-page-name="Master1-Layout5-twoTxTwoObj-Comparison" presentation:presentation-page-layout-name="Master1-PPL5" draw:id="Slide-270">
        <draw:frame draw:id="id116" presentation:style-name="a1373" draw:name="Title 1" svg:x="0.66667in" svg:y="0.59864in" svg:width="11.75174in" svg:height="1.25032in" presentation:class="title" presentation:placeholder="false">
          <draw:text-box>
            <text:p text:style-name="a1372" text:class-names="" text:cond-style-name=""><text:span text:style-name="a1371" text:class-names="">Business Questions they might ask : <text:line-break/>Analysis Optimization On Delivery speed:<text:s text:c="1"/></text:span></text:p>
          </draw:text-box>
          <svg:title/>
          <svg:desc/>
        </draw:frame>
        <draw:frame draw:id="id117" presentation:style-name="a1380" draw:name="Text Placeholder 2" svg:x="0.40701in" svg:y="2.00697in" svg:width="5.64062in" svg:height="0.61224in" presentation:class="outline" presentation:placeholder="false">
          <draw:text-box>
            <text:list text:style-name="a1376">
              <text:list-item>
                <text:p text:style-name="a1375" text:class-names="" text:cond-style-name=""><text:span text:style-name="a1374" text:class-names="">How does traffic impact delivery speed?</text:span></text:p>
              </text:list-item>
            </text:list>
            <text:list text:style-name="a1379">
              <text:list-item>
                <text:p text:style-name="a1378" text:class-names="" text:cond-style-name=""><text:span text:style-name="a1377" text:class-names=""/></text:p>
              </text:list-item>
            </text:list>
          </draw:text-box>
          <svg:title/>
          <svg:desc/>
        </draw:frame>
        <draw:frame draw:id="id118" presentation:style-name="a1381" draw:name="Content Placeholder 7" svg:x="1.05652in" svg:y="2.61111in" svg:width="4.86091in" svg:height="4.11632in" style:rel-width="scale" style:rel-height="scale" presentation:class="graphic" presentation:placeholder="false">
          <draw:image xlink:href="media/image11.png" xlink:type="simple" xlink:show="embed" xlink:actuate="onLoad"/>
          <svg:title/>
          <svg:desc>A graph of a speed

AI-generated content may be incorrect.</svg:desc>
        </draw:frame>
        <draw:frame draw:id="id119" presentation:style-name="a1388" draw:name="Text Placeholder 4" svg:x="6.66667in" svg:y="2.10937in" svg:width="5.6684in" svg:height="0.61224in" presentation:class="outline" presentation:placeholder="false">
          <draw:text-box>
            <text:list text:style-name="a1384">
              <text:list-item>
                <text:p text:style-name="a1383" text:class-names="" text:cond-style-name=""><text:span text:style-name="a1382" text:class-names="">Do area categories affect delivery speed?</text:span></text:p>
              </text:list-item>
            </text:list>
            <text:list text:style-name="a1387">
              <text:list-item>
                <text:p text:style-name="a1386" text:class-names="" text:cond-style-name=""><text:span text:style-name="a1385" text:class-names=""/></text:p>
              </text:list-item>
            </text:list>
          </draw:text-box>
          <svg:title/>
          <svg:desc/>
        </draw:frame>
        <draw:frame draw:id="id120" presentation:style-name="a1389" draw:name="Content Placeholder 9" svg:x="7.1555in" svg:y="2.61111in" svg:width="4.8574in" svg:height="4.11632in" style:rel-width="scale" style:rel-height="scale" presentation:class="graphic" presentation:placeholder="false">
          <draw:image xlink:href="media/image12.png" xlink:type="simple" xlink:show="embed" xlink:actuate="onLoad"/>
          <svg:title/>
          <svg:desc>A graph of a delivery speed

AI-generated content may be incorrect.</svg:desc>
        </draw:frame>
      </draw:page>
      <draw:page draw:name="Slide16" draw:style-name="a1390" draw:master-page-name="Master1-Layout5-twoTxTwoObj-Comparison" presentation:presentation-page-layout-name="Master1-PPL5" draw:id="Slide-271">
        <draw:frame draw:id="id121" presentation:style-name="a1397" draw:name="Text Placeholder 2" svg:x="0.66667in" svg:y="1.84354in" svg:width="5.64062in" svg:height="0.61224in" presentation:class="outline" presentation:placeholder="false">
          <draw:text-box>
            <text:list text:style-name="a1393">
              <text:list-item>
                <text:p text:style-name="a1392" text:class-names="" text:cond-style-name=""><text:span text:style-name="a1391" text:class-names="">Which type of vehicle achieves the highest average delivery speed in each area category?</text:span></text:p>
              </text:list-item>
            </text:list>
            <text:list text:style-name="a1396">
              <text:list-item>
                <text:p text:style-name="a1395" text:class-names="" text:cond-style-name=""><text:span text:style-name="a1394" text:class-names=""/></text:p>
              </text:list-item>
            </text:list>
          </draw:text-box>
          <svg:title/>
          <svg:desc/>
        </draw:frame>
        <draw:frame draw:id="id122" presentation:style-name="a1398" draw:name="Content Placeholder 7" svg:x="0.66667in" svg:y="3.12649in" svg:width="5.64063in" svg:height="3.08556in" style:rel-width="scale" style:rel-height="scale" presentation:class="graphic" presentation:placeholder="false">
          <draw:image xlink:href="media/image13.png" xlink:type="simple" xlink:show="embed" xlink:actuate="onLoad"/>
          <svg:title/>
          <svg:desc>A bar graph with text

AI-generated content may be incorrect.</svg:desc>
        </draw:frame>
        <draw:frame draw:id="id123" presentation:style-name="a1405" draw:name="Text Placeholder 4" svg:x="6.75in" svg:y="1.84354in" svg:width="5.6684in" svg:height="0.61224in" presentation:class="outline" presentation:placeholder="false">
          <draw:text-box>
            <text:list text:style-name="a1401">
              <text:list-item>
                <text:p text:style-name="a1400" text:class-names="" text:cond-style-name=""><text:span text:style-name="a1399" text:class-names="">Do age segments affect delivery speed?</text:span></text:p>
              </text:list-item>
            </text:list>
            <text:list text:style-name="a1404">
              <text:list-item>
                <text:p text:style-name="a1403" text:class-names="" text:cond-style-name=""><text:span text:style-name="a1402" text:class-names=""/></text:p>
              </text:list-item>
            </text:list>
          </draw:text-box>
          <svg:title/>
          <svg:desc/>
        </draw:frame>
        <draw:frame draw:id="id124" presentation:style-name="a1406" draw:name="Content Placeholder 9" svg:x="6.75in" svg:y="2.86078in" svg:width="5.6684in" svg:height="3.61698in" style:rel-width="scale" style:rel-height="scale" presentation:class="graphic" presentation:placeholder="false">
          <draw:image xlink:href="media/image14.png" xlink:type="simple" xlink:show="embed" xlink:actuate="onLoad"/>
          <svg:title/>
          <svg:desc>A graph of different colored bars

AI-generated content may be incorrect.</svg:desc>
        </draw:frame>
      </draw:page>
      <draw:page draw:name="Slide17" draw:style-name="a1407" draw:master-page-name="Master1-Layout5-twoTxTwoObj-Comparison" presentation:presentation-page-layout-name="Master1-PPL5" draw:id="Slide-272">
        <draw:frame draw:id="id125" presentation:style-name="a1414" draw:name="Text Placeholder 2" svg:x="0.66667in" svg:y="1.84354in" svg:width="5.64062in" svg:height="0.61224in" presentation:class="outline" presentation:placeholder="false">
          <draw:text-box>
            <text:list text:style-name="a1410">
              <text:list-item>
                <text:p text:style-name="a1409" text:class-names="" text:cond-style-name=""><text:span text:style-name="a1408" text:class-names="">Which categories of products are delivered faster?</text:span></text:p>
              </text:list-item>
            </text:list>
            <text:list text:style-name="a1413">
              <text:list-item>
                <text:p text:style-name="a1412" text:class-names="" text:cond-style-name=""><text:span text:style-name="a1411" text:class-names=""/></text:p>
              </text:list-item>
            </text:list>
          </draw:text-box>
          <svg:title/>
          <svg:desc/>
        </draw:frame>
        <draw:frame draw:id="id126" presentation:style-name="a1415" draw:name="Content Placeholder 7" svg:x="0.66667in" svg:y="2.65561in" svg:width="5.64063in" svg:height="4.02732in" style:rel-width="scale" style:rel-height="scale" presentation:class="graphic" presentation:placeholder="false">
          <draw:image xlink:href="media/image15.png" xlink:type="simple" xlink:show="embed" xlink:actuate="onLoad"/>
          <svg:title/>
          <svg:desc>A bar graph with different colors

AI-generated content may be incorrect.</svg:desc>
        </draw:frame>
        <draw:frame draw:id="id127" presentation:style-name="a1420" draw:name="Text Placeholder 4" svg:x="6.75in" svg:y="1.84354in" svg:width="5.6684in" svg:height="0.61224in" presentation:class="outline" presentation:placeholder="false">
          <draw:text-box>
            <text:list text:style-name="a1419">
              <text:list-item>
                <text:p text:style-name="a1418" text:class-names="" text:cond-style-name=""><text:span text:style-name="a1416" text:class-names="">How do weather conditions and vehicle types together impact delivery speed</text:span><text:span text:style-name="a1417" text:class-names="">?</text:span></text:p>
              </text:list-item>
            </text:list>
          </draw:text-box>
          <svg:title/>
          <svg:desc/>
        </draw:frame>
        <draw:frame draw:id="id128" presentation:style-name="a1421" draw:name="Content Placeholder 9" svg:x="6.75in" svg:y="2.83in" svg:width="5.6684in" svg:height="3.67855in" style:rel-width="scale" style:rel-height="scale" presentation:class="graphic" presentation:placeholder="false">
          <draw:image xlink:href="media/image16.png" xlink:type="simple" xlink:show="embed" xlink:actuate="onLoad"/>
          <svg:title/>
          <svg:desc>A graph of a graph showing the average speed of a vehicle

AI-generated content may be incorrect.</svg:desc>
        </draw:frame>
      </draw:page>
      <draw:page draw:name="Slide21" draw:style-name="a1422" draw:master-page-name="Master1-Layout2-obj-Title-and-Content" presentation:presentation-page-layout-name="Master1-PPL2" draw:id="Slide-276">
        <draw:frame draw:id="id129" presentation:style-name="a1427" draw:name="Title 1" svg:x="0.67in" svg:y="0.6in" svg:width="11.65089in" svg:height="1.23825in" presentation:class="title" presentation:placeholder="false">
          <draw:text-box>
            <text:p text:style-name="a1426" text:class-names="" text:cond-style-name=""><text:span text:style-name="a1423" text:class-names="">Insights</text:span><text:span text:style-name="a1424" text:class-names="">:</text:span><text:span text:style-name="a1425" text:class-names=""/></text:p>
          </draw:text-box>
          <svg:title/>
          <svg:desc/>
        </draw:frame>
        <draw:frame draw:id="id130" presentation:style-name="a1479" draw:name="Rectangle 1" svg:x="0.67in" svg:y="1.58204in" svg:width="10.08573in" svg:height="5.61205in" presentation:class="outline" presentation:placeholder="false">
          <draw:text-box>
            <text:list text:style-name="a1431">
              <text:list-item>
                <text:p text:style-name="a1430" text:class-names="" text:cond-style-name=""><text:span text:style-name="a1428" text:class-names="">Traffic Impact on Delivery Speed</text:span><text:span text:style-name="a1429" text:class-names=""/></text:p>
              </text:list-item>
            </text:list>
            <text:list text:style-name="a1434">
              <text:list-item>
                <text:p text:style-name="a1433" text:class-names="" text:cond-style-name=""><text:span text:style-name="a1432" text:class-names="">Higher traffic congestion significantly reduces delivery speed.</text:span></text:p>
              </text:list-item>
            </text:list>
            <text:list text:style-name="a1437">
              <text:list-item>
                <text:p text:style-name="a1436" text:class-names="" text:cond-style-name=""><text:span text:style-name="a1435" text:class-names="">Low and medium traffic conditions result in faster deliveries.</text:span></text:p>
              </text:list-item>
            </text:list>
            <text:list text:style-name="a1441">
              <text:list-item>
                <text:p text:style-name="a1440" text:class-names="" text:cond-style-name=""><text:span text:style-name="a1438" text:class-names="">Area Categories Effect</text:span><text:span text:style-name="a1439" text:class-names=""/></text:p>
              </text:list-item>
            </text:list>
            <text:list text:style-name="a1444">
              <text:list-item>
                <text:p text:style-name="a1443" text:class-names="" text:cond-style-name=""><text:span text:style-name="a1442" text:class-names="">"Other" areas have the highest average delivery speed.</text:span></text:p>
              </text:list-item>
            </text:list>
            <text:list text:style-name="a1447">
              <text:list-item>
                <text:p text:style-name="a1446" text:class-names="" text:cond-style-name=""><text:span text:style-name="a1445" text:class-names="">Metropolitan areas show moderate performance.</text:span></text:p>
              </text:list-item>
            </text:list>
            <text:list text:style-name="a1450">
              <text:list-item>
                <text:p text:style-name="a1449" text:class-names="" text:cond-style-name=""><text:span text:style-name="a1448" text:class-names="">Urban areas are the slowest, likely due to dense population and road restrictions.</text:span></text:p>
              </text:list-item>
            </text:list>
            <text:list text:style-name="a1454">
              <text:list-item>
                <text:p text:style-name="a1453" text:class-names="" text:cond-style-name=""><text:span text:style-name="a1451" text:class-names="">Product Categories</text:span><text:span text:style-name="a1452" text:class-names=""/></text:p>
              </text:list-item>
            </text:list>
            <text:list text:style-name="a1457">
              <text:list-item>
                <text:p text:style-name="a1456" text:class-names="" text:cond-style-name=""><text:span text:style-name="a1455" text:class-names="">Groceries have the fastest delivery speeds (20+ km/h), possibly due to priority handling.</text:span></text:p>
              </text:list-item>
            </text:list>
            <text:list text:style-name="a1460">
              <text:list-item>
                <text:p text:style-name="a1459" text:class-names="" text:cond-style-name=""><text:span text:style-name="a1458" text:class-names="">Cosmetics and Toys also perform relatively well.</text:span></text:p>
              </text:list-item>
            </text:list>
            <text:list text:style-name="a1463">
              <text:list-item>
                <text:p text:style-name="a1462" text:class-names="" text:cond-style-name=""><text:span text:style-name="a1461" text:class-names="">Books and Apparel have the lowest delivery speeds.</text:span></text:p>
              </text:list-item>
            </text:list>
            <text:list text:style-name="a1466">
              <text:list-item>
                <text:p text:style-name="a1465" text:class-names="" text:cond-style-name=""><text:span text:style-name="a1464" text:class-names="">Vehicle Types by Area</text:span></text:p>
              </text:list-item>
            </text:list>
            <text:list text:style-name="a1471">
              <text:list-item>
                <text:p text:style-name="a1470" text:class-names="" text:cond-style-name=""><text:span text:style-name="a1467" text:class-names="">.</text:span><text:span text:style-name="a1468" text:class-names="">Scooters perform best in Metropolitan and Other areas.</text:span><text:span text:style-name="a1469" text:class-names=""/></text:p>
              </text:list-item>
            </text:list>
            <text:list text:style-name="a1475">
              <text:list-item>
                <text:p text:style-name="a1474" text:class-names="" text:cond-style-name=""><text:span text:style-name="a1472" text:class-names="">.<text:s text:c="1"/></text:span><text:span text:style-name="a1473" text:class-names="">Vans are more effective in Urban areas (despite overall slower speed</text:span></text:p>
              </text:list-item>
            </text:list>
            <text:list text:style-name="a1478">
              <text:list-item>
                <text:p text:style-name="a1477" text:class-names="" text:cond-style-name=""><text:span text:style-name="a1476" text:class-names=""/></text:p>
              </text:list-item>
            </text:list>
          </draw:text-box>
          <svg:title/>
          <svg:desc/>
        </draw:frame>
      </draw:page>
      <draw:page draw:name="Slide22" draw:style-name="a1480" draw:master-page-name="Master1-Layout2-obj-Title-and-Content" presentation:presentation-page-layout-name="Master1-PPL2" draw:id="Slide-277">
        <draw:frame draw:id="id131" presentation:style-name="a1506" draw:name="Content Placeholder 2" svg:x="0.67in" svg:y="1.87613in" svg:width="11.6509in" svg:height="5.02387in" presentation:class="outline" presentation:placeholder="false">
          <draw:text-box>
            <text:list text:style-name="a1485">
              <text:list-item>
                <text:p text:style-name="a1484" text:class-names="" text:cond-style-name=""><text:span text:style-name="a1481" text:class-names="">Weather &amp; Vehicle Impact</text:span><text:span text:style-name="a1482" text:class-names="">:</text:span><text:span text:style-name="a1483" text:class-names=""/></text:p>
              </text:list-item>
            </text:list>
            <text:list text:style-name="a1488">
              <text:list-item>
                <text:list text:style-name="a1488">
                  <text:list-item>
                    <text:p text:style-name="a1487" text:class-names="" text:cond-style-name=""><text:span text:style-name="a1486" text:class-names="">Good weather boosts delivery speed across all vehicle types.</text:span></text:p>
                  </text:list-item>
                </text:list>
              </text:list-item>
            </text:list>
            <text:list text:style-name="a1491">
              <text:list-item>
                <text:list text:style-name="a1491">
                  <text:list-item>
                    <text:p text:style-name="a1490" text:class-names="" text:cond-style-name=""><text:span text:style-name="a1489" text:class-names="">Motorcycles consistently achieve the highest speeds, followed by scooters, then vans.</text:span></text:p>
                  </text:list-item>
                </text:list>
              </text:list-item>
            </text:list>
            <text:list text:style-name="a1496">
              <text:list-item>
                <text:p text:style-name="a1495" text:class-names="" text:cond-style-name=""><text:span text:style-name="a1492" text:class-names="">Age Segments</text:span><text:span text:style-name="a1493" text:class-names="">:</text:span><text:span text:style-name="a1494" text:class-names=""/></text:p>
              </text:list-item>
            </text:list>
            <text:list text:style-name="a1499">
              <text:list-item>
                <text:list text:style-name="a1499">
                  <text:list-item>
                    <text:p text:style-name="a1498" text:class-names="" text:cond-style-name=""><text:span text:style-name="a1497" text:class-names="">Younger delivery personnel (20–25, 25–30) achieve higher speeds.</text:span></text:p>
                  </text:list-item>
                </text:list>
              </text:list-item>
            </text:list>
            <text:list text:style-name="a1502">
              <text:list-item>
                <text:list text:style-name="a1502">
                  <text:list-item>
                    <text:p text:style-name="a1501" text:class-names="" text:cond-style-name=""><text:span text:style-name="a1500" text:class-names="">Older segments (30–35, 35–40) tend to be slower, suggesting age impacts efficiency.</text:span></text:p>
                  </text:list-item>
                </text:list>
              </text:list-item>
            </text:list>
            <text:list text:style-name="a1505">
              <text:list-item>
                <text:p text:style-name="a1504" text:class-names="" text:cond-style-name=""><text:span text:style-name="a1503" text:class-names=""/></text:p>
              </text:list-item>
            </text:list>
          </draw:text-box>
          <svg:title/>
          <svg:desc/>
        </draw:frame>
      </draw:page>
      <draw:page draw:name="Slide23" draw:style-name="a1507" draw:master-page-name="Master1-Layout2-obj-Title-and-Content" presentation:presentation-page-layout-name="Master1-PPL2" draw:id="Slide-278">
        <draw:frame draw:id="id132" presentation:style-name="a1512" draw:name="Title 1" svg:x="0.67in" svg:y="0.6in" svg:width="11.65089in" svg:height="1.23825in" presentation:class="title" presentation:placeholder="false">
          <draw:text-box>
            <text:p text:style-name="a1511" text:class-names="" text:cond-style-name=""><text:span text:style-name="a1508" text:class-names="">Recommendations</text:span><text:span text:style-name="a1509" text:class-names="">:</text:span><text:span text:style-name="a1510" text:class-names=""><text:line-break/></text:span></text:p>
          </draw:text-box>
          <svg:title/>
          <svg:desc/>
        </draw:frame>
        <draw:frame draw:id="id133" presentation:style-name="a1606" draw:name="Rectangle 1" svg:x="0.21519in" svg:y="0.87635in" svg:width="13.77215in" svg:height="7.24451in" presentation:class="outline" presentation:placeholder="false">
          <draw:text-box>
            <text:list text:style-name="a1515">
              <text:list-item>
                <text:p text:style-name="a1514" text:class-names="" text:cond-style-name=""><text:span text:style-name="a1513" text:class-names=""/></text:p>
              </text:list-item>
            </text:list>
            <text:list text:style-name="a1519">
              <text:list-item>
                <text:p text:style-name="a1518" text:class-names="" text:cond-style-name=""><text:span text:style-name="a1516" text:class-names="">Traffic-Aware Route Optimization</text:span><text:span text:style-name="a1517" text:class-names="">:</text:span></text:p>
              </text:list-item>
            </text:list>
            <text:list text:style-name="a1522">
              <text:list-item>
                <text:p text:style-name="a1521" text:class-names="" text:cond-style-name=""><text:span text:style-name="a1520" text:class-names="">nvest in AI-driven dynamic routing to avoid high-traffic zones.</text:span></text:p>
              </text:list-item>
            </text:list>
            <text:list text:style-name="a1525">
              <text:list-item>
                <text:p text:style-name="a1524" text:class-names="" text:cond-style-name=""><text:span text:style-name="a1523" text:class-names="">Use real-time traffic monitoring to adjust delivery routes.</text:span></text:p>
              </text:list-item>
            </text:list>
            <text:list text:style-name="a1529">
              <text:list-item>
                <text:p text:style-name="a1528" text:class-names="" text:cond-style-name=""><text:span text:style-name="a1526" text:class-names="">Area-Specific Strategies:</text:span><text:span text:style-name="a1527" text:class-names=""/></text:p>
              </text:list-item>
            </text:list>
            <text:list text:style-name="a1536">
              <text:list-item>
                <text:p text:style-name="a1535" text:class-names="" text:cond-style-name=""><text:span text:style-name="a1530" text:class-names="">For<text:s text:c="1"/></text:span><text:span text:style-name="a1531" text:class-names="">Urban areas</text:span><text:span text:style-name="a1532" text:class-names="">, optimize<text:s text:c="1"/></text:span><text:span text:style-name="a1533" text:class-names="">van routes</text:span><text:span text:style-name="a1534" text:class-names=""><text:s text:c="1"/>and consider micro-hubs to reduce congestion delays.</text:span></text:p>
              </text:list-item>
            </text:list>
            <text:list text:style-name="a1543">
              <text:list-item>
                <text:p text:style-name="a1542" text:class-names="" text:cond-style-name=""><text:span text:style-name="a1537" text:class-names="">For<text:s text:c="1"/></text:span><text:span text:style-name="a1538" text:class-names="">Metropolitan &amp; Other areas</text:span><text:span text:style-name="a1539" text:class-names="">, focus on expanding<text:s text:c="1"/></text:span><text:span text:style-name="a1540" text:class-names="">scooter fleets</text:span><text:span text:style-name="a1541" text:class-names=""><text:s text:c="1"/>for faster deliveries.</text:span></text:p>
              </text:list-item>
            </text:list>
            <text:list text:style-name="a1547">
              <text:list-item>
                <text:p text:style-name="a1546" text:class-names="" text:cond-style-name=""><text:span text:style-name="a1544" text:class-names="">Product Delivery Prioritization:</text:span><text:span text:style-name="a1545" text:class-names=""/></text:p>
              </text:list-item>
            </text:list>
            <text:list text:style-name="a1552">
              <text:list-item>
                <text:p text:style-name="a1551" text:class-names="" text:cond-style-name=""><text:span text:style-name="a1548" text:class-names="">Maintain strong focus on<text:s text:c="1"/></text:span><text:span text:style-name="a1549" text:class-names="">groceries</text:span><text:span text:style-name="a1550" text:class-names=""><text:s text:c="1"/>as they show highest delivery efficiency.</text:span></text:p>
              </text:list-item>
            </text:list>
            <text:list text:style-name="a1557">
              <text:list-item>
                <text:p text:style-name="a1556" text:class-names="" text:cond-style-name=""><text:span text:style-name="a1553" text:class-names="">Introduce speed-enhancement processes for slower categories like<text:s text:c="1"/></text:span><text:span text:style-name="a1554" text:class-names="">books and apparel</text:span><text:span text:style-name="a1555" text:class-names=""><text:s text:c="1"/>(e.g., batching, pre-sorting).</text:span></text:p>
              </text:list-item>
            </text:list>
            <text:list text:style-name="a1561">
              <text:list-item>
                <text:p text:style-name="a1560" text:class-names="" text:cond-style-name=""><text:span text:style-name="a1558" text:class-names="">Weather-Adaptive Policies:</text:span><text:span text:style-name="a1559" text:class-names=""/></text:p>
              </text:list-item>
            </text:list>
            <text:list text:style-name="a1568">
              <text:list-item>
                <text:list text:style-name="a1568">
                  <text:list-item>
                    <text:p text:style-name="a1567" text:class-names="" text:cond-style-name=""><text:span text:style-name="a1562" text:class-names="">On<text:s text:c="1"/></text:span><text:span text:style-name="a1563" text:class-names="">bad weather days</text:span><text:span text:style-name="a1564" text:class-names="">, prioritize<text:s text:c="1"/></text:span><text:span text:style-name="a1565" text:class-names="">motorcycles</text:span><text:span text:style-name="a1566" text:class-names=""><text:s text:c="1"/>with trained riders for efficiency.</text:span></text:p>
                  </text:list-item>
                </text:list>
              </text:list-item>
            </text:list>
            <text:list text:style-name="a1571">
              <text:list-item>
                <text:list text:style-name="a1571">
                  <text:list-item>
                    <text:p text:style-name="a1570" text:class-names="" text:cond-style-name=""><text:span text:style-name="a1569" text:class-names="">Implement safety-first delivery SLAs (slightly longer timelines during storms to balance speed &amp; safety).</text:span></text:p>
                  </text:list-item>
                </text:list>
              </text:list-item>
            </text:list>
            <text:list text:style-name="a1576">
              <text:list-item>
                <text:p text:style-name="a1575" text:class-names="" text:cond-style-name=""><text:span text:style-name="a1572" text:class-names="">Workforce Optimization</text:span><text:span text:style-name="a1573" text:class-names="">:</text:span><text:span text:style-name="a1574" text:class-names=""/></text:p>
              </text:list-item>
            </text:list>
            <text:list text:style-name="a1581">
              <text:list-item>
                <text:list text:style-name="a1581">
                  <text:list-item>
                    <text:p text:style-name="a1580" text:class-names="" text:cond-style-name=""><text:span text:style-name="a1577" text:class-names="">Recruit and train more delivery riders in the<text:s text:c="1"/></text:span><text:span text:style-name="a1578" text:class-names="">20–30 age group</text:span><text:span text:style-name="a1579" text:class-names=""><text:s text:c="1"/>for higher performance.</text:span></text:p>
                  </text:list-item>
                </text:list>
              </text:list-item>
            </text:list>
            <text:list text:style-name="a1584">
              <text:list-item>
                <text:list text:style-name="a1584">
                  <text:list-item>
                    <text:p text:style-name="a1583" text:class-names="" text:cond-style-name=""><text:span text:style-name="a1582" text:class-names="">Provide performance-based incentives to motivate older segments to match efficiency.</text:span></text:p>
                  </text:list-item>
                </text:list>
              </text:list-item>
            </text:list>
            <text:list text:style-name="a1589">
              <text:list-item>
                <text:p text:style-name="a1588" text:class-names="" text:cond-style-name=""><text:span text:style-name="a1585" text:class-names="">Fleet &amp; Operations</text:span><text:span text:style-name="a1586" text:class-names="">:</text:span><text:span text:style-name="a1587" text:class-names=""/></text:p>
              </text:list-item>
            </text:list>
            <text:list text:style-name="a1594">
              <text:list-item>
                <text:list text:style-name="a1594">
                  <text:list-item>
                    <text:p text:style-name="a1593" text:class-names="" text:cond-style-name=""><text:span text:style-name="a1590" text:class-names="">Expand<text:s text:c="1"/></text:span><text:span text:style-name="a1591" text:class-names="">scooter and motorcycle fleet</text:span><text:span text:style-name="a1592" text:class-names=""><text:s text:c="1"/>where possible to maximize speed.</text:span></text:p>
                  </text:list-item>
                </text:list>
              </text:list-item>
            </text:list>
            <text:list text:style-name="a1599">
              <text:list-item>
                <text:list text:style-name="a1599">
                  <text:list-item>
                    <text:p text:style-name="a1598" text:class-names="" text:cond-style-name=""><text:span text:style-name="a1595" text:class-names="">Deploy<text:s text:c="1"/></text:span><text:span text:style-name="a1596" text:class-names="">vans</text:span><text:span text:style-name="a1597" text:class-names=""><text:s text:c="1"/>strategically in urban congested zones where small vehicles can’t carry volume.</text:span></text:p>
                  </text:list-item>
                </text:list>
              </text:list-item>
            </text:list>
            <text:list text:style-name="a1602">
              <text:list-item>
                <text:p text:style-name="a1601" text:class-names="" text:cond-style-name=""><text:span text:style-name="a1600" text:class-names=""/></text:p>
              </text:list-item>
            </text:list>
            <text:list text:style-name="a1605">
              <text:list-item>
                <text:p text:style-name="a1604" text:class-names="" text:cond-style-name=""><text:span text:style-name="a1603" text:class-names=""/></text:p>
              </text:list-item>
            </text:list>
          </draw:text-box>
          <svg:title/>
          <svg:desc/>
        </draw:frame>
        <presentation:notes draw:style-name="a1612">
          <draw:page-thumbnail draw:page-number="18" svg:x="0.75in" svg:y="1.25in" svg:width="6in" svg:height="3.375in" presentation:class="page" draw:id="id134" presentation:style-name="a1607" draw:name="Slide Image Placeholder 1">
            <svg:title/>
            <svg:desc/>
          </draw:page-thumbnail>
          <draw:frame draw:id="id135" presentation:style-name="a1608" draw:name="Notes Placeholder 2" svg:x="0.75in" svg:y="4.8125in" svg:width="6in" svg:height="3.9375in" presentation:class="notes" presentation:placeholder="true">
            <draw:text-box/>
            <svg:title/>
            <svg:desc/>
          </draw:frame>
          <draw:frame draw:id="id136" draw:style-name="a1611" draw:name="Slide Number Placeholder 3" svg:x="4.24826in" svg:y="9.49826in" svg:width="3.25in" svg:height="0.50174in">
            <draw:text-box>
              <text:p text:style-name="a1610" text:class-names="" text:cond-style-name=""><text:span text:style-name="a1609" text:class-names=""><text:page-number style:num-format="1" text:fixed="false"/></text:span></text:p>
            </draw:text-box>
            <svg:title/>
            <svg:desc/>
          </draw:frame>
        </presentation:notes>
      </draw:page>
      <draw:page draw:name="Slide24" draw:style-name="a1613" draw:master-page-name="Master1-Layout2-obj-Title-and-Content" presentation:presentation-page-layout-name="Master1-PPL2" draw:id="Slide-279">
        <draw:frame draw:id="id137" presentation:style-name="a1618" draw:name="Title 1" svg:x="0.67in" svg:y="0.6in" svg:width="11.65089in" svg:height="1.23825in" presentation:class="title" presentation:placeholder="false">
          <draw:text-box>
            <text:p text:style-name="a1617" text:class-names="" text:cond-style-name=""><text:span text:style-name="a1614" text:class-names="">Conclusion</text:span><text:span text:style-name="a1615" text:class-names="">:</text:span><text:span text:style-name="a1616" text:class-names=""/></text:p>
          </draw:text-box>
          <svg:title/>
          <svg:desc/>
        </draw:frame>
        <draw:frame draw:id="id138" presentation:style-name="a1654" draw:name="Content Placeholder 2" svg:x="0.67in" svg:y="1.87613in" svg:width="11.6509in" svg:height="5.02387in" presentation:class="outline" presentation:placeholder="false">
          <draw:text-box>
            <text:list text:style-name="a1622">
              <text:list-item>
                <text:p text:style-name="a1621" text:class-names="" text:cond-style-name=""><text:span text:style-name="a1619" text:class-names="">Overall Strategy:</text:span><text:span text:style-name="a1620" text:class-names=""/></text:p>
              </text:list-item>
            </text:list>
            <text:list text:style-name="a1627">
              <text:list-item>
                <text:p text:style-name="a1626" text:class-names="" text:cond-style-name=""><text:span text:style-name="a1623" text:class-names="">Use<text:s text:c="1"/></text:span><text:span text:style-name="a1624" text:class-names="">data-driven route planning</text:span><text:span text:style-name="a1625" text:class-names=""><text:s text:c="1"/>(traffic + area).</text:span></text:p>
              </text:list-item>
            </text:list>
            <text:list text:style-name="a1632">
              <text:list-item>
                <text:p text:style-name="a1631" text:class-names="" text:cond-style-name=""><text:span text:style-name="a1628" text:class-names="">Build<text:s text:c="1"/></text:span><text:span text:style-name="a1629" text:class-names="">area &amp; product-specific delivery policies</text:span><text:span text:style-name="a1630" text:class-names="">.</text:span></text:p>
              </text:list-item>
            </text:list>
            <text:list text:style-name="a1637">
              <text:list-item>
                <text:p text:style-name="a1636" text:class-names="" text:cond-style-name=""><text:span text:style-name="a1633" text:class-names="">Optimize<text:s text:c="1"/></text:span><text:span text:style-name="a1634" text:class-names="">fleet allocation</text:span><text:span text:style-name="a1635" text:class-names=""><text:s text:c="1"/>(motorcycles/scooters for speed, vans for capacity).</text:span></text:p>
              </text:list-item>
            </text:list>
            <text:list text:style-name="a1642">
              <text:list-item>
                <text:p text:style-name="a1641" text:class-names="" text:cond-style-name=""><text:span text:style-name="a1638" text:class-names="">Focus on<text:s text:c="1"/></text:span><text:span text:style-name="a1639" text:class-names="">younger workforce segments</text:span><text:span text:style-name="a1640" text:class-names=""><text:s text:c="1"/>while supporting older riders with incentives.</text:span></text:p>
              </text:list-item>
            </text:list>
            <text:list text:style-name="a1645">
              <text:list-item>
                <text:p text:style-name="a1644" text:class-names="" text:cond-style-name=""><text:span text:style-name="a1643" text:class-names="">Conclusion:</text:span></text:p>
              </text:list-item>
            </text:list>
            <text:list text:style-name="a1649">
              <text:list-item>
                <text:p text:style-name="a1648" text:class-names="" text:cond-style-name=""><text:span text:style-name="a1646" text:class-names="">Delivery speed is strongly affected by traffic, area type, product category, vehicle type, and driver age. By improving route planning and using the right vehicles for each area, companies can increase efficiency and achieve faster deliveries.</text:span><text:span text:style-name="a1647" text:class-names=""/></text:p>
              </text:list-item>
            </text:list>
            <text:list text:style-name="a1653">
              <text:list-item>
                <text:p text:style-name="a1652" text:class-names="" text:cond-style-name=""><text:span text:style-name="a1650" text:class-names=""><text:s text:c="1"/></text:span><text:span text:style-name="a1651" text:class-names=""/></text:p>
              </text:list-item>
            </text:list>
          </draw:text-box>
          <svg:title/>
          <svg:desc/>
        </draw:frame>
        <draw:custom-shape svg:x="0in" svg:y="0.13219in" svg:width="0.23351in" svg:height="0.23561in" draw:id="id139" draw:style-name="a1658" draw:name="Rectangle 1">
          <svg:title/>
          <svg:desc/>
          <text:p text:style-name="a1657" text:class-names="" text:cond-style-name=""><text:span text:style-name="a1655" text:class-names="">.</text:span><text:span text:style-name="a1656" text:class-names=""/></text:p>
          <draw:enhanced-geometry xmlns:dr3d="urn:oasis:names:tc:opendocument:xmlns:dr3d:1.0" draw:type="non-primitive" svg:viewBox="0 0 21600 21600" draw:enhanced-path="M 0 0 L 21600 0 21600 21600 0 21600 Z N"/>
        </draw:custom-shape>
        <draw:custom-shape svg:x="0in" svg:y="0.5in" svg:width="13.33333in" svg:height="0.01736in" draw:id="id140" draw:style-name="a1661" draw:name="Rectangle 2">
          <svg:title/>
          <svg:desc/>
          <text:p text:style-name="a1660" text:class-names="" text:cond-style-name=""><text:span text:style-name="a1659" text:class-names=""/></text:p>
          <draw:enhanced-geometry xmlns:dr3d="urn:oasis:names:tc:opendocument:xmlns:dr3d:1.0" draw:type="non-primitive" svg:viewBox="0 0 21600 21600" draw:enhanced-path="M 0 0 L 21600 0 21600 21600 0 21600 Z N"/>
        </draw:custom-shape>
        <draw:custom-shape svg:x="0in" svg:y="0.51736in" svg:width="13.33333in" svg:height="0.5in" draw:id="id141" draw:style-name="a1664" draw:name="Rectangle 3">
          <svg:title/>
          <svg:desc/>
          <text:p text:style-name="a1663" text:class-names="" text:cond-style-name=""><text:span text:style-name="a1662"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51741in" svg:y="1.22743in" svg:width="8.29851in" svg:height="2.86653in"/>
      <presentation:placeholder presentation:object="subtitle" svg:x="2.51741in" svg:y="4.20353in" svg:width="8.29851in" svg:height="1.5464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2" style:display-name="Title and Content">
      <presentation:placeholder presentation:object="title" svg:x="0.67in" svg:y="0.6in" svg:width="11.65089in" svg:height="1.23825in"/>
      <presentation:placeholder presentation:object="object" svg:x="0.67in" svg:y="1.87613in" svg:width="11.6509in" svg:height="5.0238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3" style:display-name="Section Header">
      <presentation:placeholder presentation:object="title" svg:x="0.65987in" svg:y="0.60544in" svg:width="9.04762in" svg:height="4.38414in"/>
      <presentation:placeholder presentation:object="outline" svg:x="0.65986in" svg:y="5.0191in" svg:width="9.04762in" svg:height="1.51424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4" style:display-name="Two Content">
      <presentation:placeholder presentation:object="title" svg:x="0.67in" svg:y="0.6in" svg:width="11.74667in" svg:height="1.23825in"/>
      <presentation:placeholder presentation:object="object" svg:x="0.67in" svg:y="1.99653in" svg:width="5.66667in" svg:height="4.75868in"/>
      <presentation:placeholder presentation:object="object" svg:x="6.75in" svg:y="1.99653in" svg:width="5.66667in" svg:height="4.75868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5" style:display-name="Comparison">
      <presentation:placeholder presentation:object="title" svg:x="0.66667in" svg:y="0.59864in" svg:width="11.75174in" svg:height="1.25032in"/>
      <presentation:placeholder presentation:object="outline" svg:x="0.66667in" svg:y="1.84354in" svg:width="5.64062in" svg:height="0.61224in"/>
      <presentation:placeholder presentation:object="object" svg:x="0.66667in" svg:y="2.61034in" svg:width="5.64062in" svg:height="4.11755in"/>
      <presentation:placeholder presentation:object="outline" svg:x="6.75in" svg:y="1.84354in" svg:width="5.6684in" svg:height="0.61224in"/>
      <presentation:placeholder presentation:object="object" svg:x="6.75in" svg:y="2.61034in" svg:width="5.6684in" svg:height="4.11755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6" style:display-name="Title Only">
      <presentation:placeholder presentation:object="title" svg:x="0.67in" svg:y="0.6in" svg:width="11.65089in" svg:height="1.23825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7" style:display-name="Blank">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8" style:display-name="Content with Caption">
      <presentation:placeholder presentation:object="title" svg:x="0.65306in" svg:y="0.60544in" svg:width="3.93223in" svg:height="1.92203in"/>
      <presentation:placeholder presentation:object="object" svg:x="5.61538in" svg:y="0.60544in" svg:width="6.86761in" svg:height="6in"/>
      <presentation:placeholder presentation:object="outline" svg:x="0.65306in" svg:y="2.52747in" svg:width="3.93223in" svg:height="4.0779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9" style:display-name="Picture with Caption">
      <presentation:placeholder presentation:object="title" svg:x="0.65in" svg:y="0.61in" svg:width="3.93223in" svg:height="2.41941in"/>
      <presentation:placeholder presentation:object="graphic" svg:x="5.53731in" svg:y="0.71862in" svg:width="7.09065in" svg:height="6.07601in"/>
      <presentation:placeholder presentation:object="outline" svg:x="0.66667in" svg:y="3.0907in" svg:width="3.92124in" svg:height="3.7561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10" style:display-name="Title and Vertical Text">
      <presentation:placeholder presentation:object="title" svg:x="0.67in" svg:y="0.6in" svg:width="11.5in" svg:height="1.23825in"/>
      <presentation:placeholder presentation:object="outline" svg:x="0.67in" svg:y="1.83825in" svg:width="11.5in" svg:height="4.91696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11" style:display-name="Vertical Title and Text">
      <presentation:placeholder presentation:object="title" svg:x="10.53684in" svg:y="0.63265in" svg:width="2.23867in" svg:height="6.12256in"/>
      <presentation:placeholder presentation:object="outline" svg:x="0.91667in" svg:y="0.63265in" svg:width="9.62017in" svg:height="6.12256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702" draw:style="linear" draw:angle="0" draw:start-color="#000000" draw:end-color="#000000" draw:start-intensity="0%" draw:end-intensity="5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text-transform="uppercas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VanillaVTI" style:page-layout-name="pageLayout1" draw:style-name="a0">
      <draw:frame draw:id="id0" presentation:style-name="a3" draw:name="Title Placeholder 1" svg:x="0.67in" svg:y="0.6in" svg:width="11.65089in" svg:height="1.238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7in" svg:y="1.87613in" svg:width="11.6509in" svg:height="5.0238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15in" svg:y="7.05709in" svg:width="3.82143in" svg:height="0.39931in" presentation:class="date-time" presentation:placeholder="false">
        <draw:text-box>
          <text:p text:style-name="a22" text:class-names="" text:cond-style-name=""><text:span text:style-name="a20" text:class-names=""><text:date text:fixed="false" style:data-style-name="a21">8/22/2025</text:date></text:span></text:p>
        </draw:text-box>
        <svg:title/>
        <svg:desc/>
      </draw:frame>
      <draw:frame draw:id="id3" presentation:style-name="a26" draw:name="Footer Placeholder 4" svg:x="9.70748in" svg:y="7.05709in" svg:width="3.06803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2.72109in" svg:y="7.05709in" svg:width="0.46939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8/22/2025</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2.51741in" svg:y="1.22743in" svg:width="8.29851in" svg:height="2.86653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2.51741in" svg:y="4.20353in" svg:width="8.29851in" svg:height="1.5464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15in" svg:y="7.05709in" svg:width="3.82143in" svg:height="0.39931in" presentation:class="date-time" presentation:placeholder="false">
        <draw:text-box>
          <text:p text:style-name="a69" text:class-names="" text:cond-style-name=""><text:span text:style-name="a67" text:class-names=""><text:date text:fixed="false" style:data-style-name="a68">8/22/2025</text:date></text:span></text:p>
        </draw:text-box>
        <svg:title/>
        <svg:desc/>
      </draw:frame>
      <draw:frame draw:id="id14" presentation:style-name="a73" draw:name="Footer Placeholder 4" svg:x="9.70748in" svg:y="7.05709in" svg:width="3.06803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12.72109in" svg:y="7.05709in" svg:width="0.46939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8/22/2025</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67in" svg:y="0.6in" svg:width="11.65089in" svg:height="1.2382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67in" svg:y="1.87613in" svg:width="11.6509in" svg:height="5.02387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15in" svg:y="7.05709in" svg:width="3.82143in" svg:height="0.39931in" presentation:class="date-time" presentation:placeholder="false">
        <draw:text-box>
          <text:p text:style-name="a129" text:class-names="" text:cond-style-name=""><text:span text:style-name="a127" text:class-names=""><text:date text:fixed="false" style:data-style-name="a128">8/22/2025</text:date></text:span></text:p>
        </draw:text-box>
        <svg:title/>
        <svg:desc/>
      </draw:frame>
      <draw:frame draw:id="id19" presentation:style-name="a133" draw:name="Footer Placeholder 4" svg:x="9.70748in" svg:y="7.05709in" svg:width="3.06803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12.72109in" svg:y="7.05709in" svg:width="0.46939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8/22/2025</text:date></text:span></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65987in" svg:y="0.60544in" svg:width="9.04762in" svg:height="4.38414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65986in" svg:y="5.0191in" svg:width="9.04762in" svg:height="1.51424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15in" svg:y="7.05709in" svg:width="3.82143in" svg:height="0.39931in" presentation:class="date-time" presentation:placeholder="false">
        <draw:text-box>
          <text:p text:style-name="a177" text:class-names="" text:cond-style-name=""><text:span text:style-name="a175" text:class-names=""><text:date text:fixed="false" style:data-style-name="a176">8/22/2025</text:date></text:span></text:p>
        </draw:text-box>
        <svg:title/>
        <svg:desc/>
      </draw:frame>
      <draw:frame draw:id="id24" presentation:style-name="a181" draw:name="Footer Placeholder 4" svg:x="9.70748in" svg:y="7.05709in" svg:width="3.06803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12.72109in" svg:y="7.05709in" svg:width="0.46939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8/22/2025</text:date></text:span></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67in" svg:y="0.6in" svg:width="11.74667in" svg:height="1.2382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67in" svg:y="1.99653in" svg:width="5.66667in" svg:height="4.7586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6.75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15in" svg:y="7.05709in" svg:width="3.82143in" svg:height="0.39931in" presentation:class="date-time" presentation:placeholder="false">
        <draw:text-box>
          <text:p text:style-name="a253" text:class-names="" text:cond-style-name=""><text:span text:style-name="a251" text:class-names=""><text:date text:fixed="false" style:data-style-name="a252">8/22/2025</text:date></text:span></text:p>
        </draw:text-box>
        <svg:title/>
        <svg:desc/>
      </draw:frame>
      <draw:frame draw:id="id30" presentation:style-name="a257" draw:name="Footer Placeholder 5" svg:x="9.70748in" svg:y="7.05709in" svg:width="3.06803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12.72109in" svg:y="7.05709in" svg:width="0.46939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8/22/2025</text:date></text:span></text:p>
          </draw:text-box>
          <svg:title/>
          <svg:desc/>
        </draw:frame>
        <draw:page-thumbnail svg:x="0.75in" svg:y="1.25in" svg:width="6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66667in" svg:y="0.59864in" svg:width="11.75174in" svg:height="1.25032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66667in" svg:y="1.84354in" svg:width="5.64062in" svg:height="0.6122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66667in" svg:y="2.61034in" svg:width="5.64062in" svg:height="4.11755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6.75in" svg:y="1.84354in" svg:width="5.6684in" svg:height="0.6122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6.75in" svg:y="2.61034in" svg:width="5.6684in" svg:height="4.11755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15in" svg:y="7.05709in" svg:width="3.82143in" svg:height="0.39931in" presentation:class="date-time" presentation:placeholder="false">
        <draw:text-box>
          <text:p text:style-name="a337" text:class-names="" text:cond-style-name=""><text:span text:style-name="a335" text:class-names=""><text:date text:fixed="false" style:data-style-name="a336">8/22/2025</text:date></text:span></text:p>
        </draw:text-box>
        <svg:title/>
        <svg:desc/>
      </draw:frame>
      <draw:frame draw:id="id38" presentation:style-name="a341" draw:name="Footer Placeholder 7" svg:x="9.70748in" svg:y="7.05709in" svg:width="3.06803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12.72109in" svg:y="7.05709in" svg:width="0.46939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8/22/2025</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67in" svg:y="0.6in" svg:width="11.65089in" svg:height="1.2382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15in" svg:y="7.05709in" svg:width="3.82143in" svg:height="0.39931in" presentation:class="date-time" presentation:placeholder="false">
        <draw:text-box>
          <text:p text:style-name="a381" text:class-names="" text:cond-style-name=""><text:span text:style-name="a379" text:class-names=""><text:date text:fixed="false" style:data-style-name="a380">8/22/2025</text:date></text:span></text:p>
        </draw:text-box>
        <svg:title/>
        <svg:desc/>
      </draw:frame>
      <draw:frame draw:id="id42" presentation:style-name="a385" draw:name="Footer Placeholder 3" svg:x="9.70748in" svg:y="7.05709in" svg:width="3.06803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12.72109in" svg:y="7.05709in" svg:width="0.46939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8/22/2025</text:date></text:span></text:p>
          </draw:text-box>
          <svg:title/>
          <svg:desc/>
        </draw:frame>
        <draw:page-thumbnail svg:x="0.75in" svg:y="1.25in" svg:width="6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15in" svg:y="7.05709in" svg:width="3.82143in" svg:height="0.39931in" presentation:class="date-time" presentation:placeholder="false">
        <draw:text-box>
          <text:p text:style-name="a422" text:class-names="" text:cond-style-name=""><text:span text:style-name="a420" text:class-names=""><text:date text:fixed="false" style:data-style-name="a421">8/22/2025</text:date></text:span></text:p>
        </draw:text-box>
        <svg:title/>
        <svg:desc/>
      </draw:frame>
      <draw:frame draw:id="id45" presentation:style-name="a426" draw:name="Footer Placeholder 2" svg:x="9.70748in" svg:y="7.05709in" svg:width="3.06803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12.72109in" svg:y="7.05709in" svg:width="0.46939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8/22/2025</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65306in" svg:y="0.60544in" svg:width="3.93223in" svg:height="1.92203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5.61538in" svg:y="0.60544in" svg:width="6.86761in" svg:height="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65306in" svg:y="2.52747in" svg:width="3.93223in" svg:height="4.07797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15in" svg:y="7.05709in" svg:width="3.82143in" svg:height="0.39931in" presentation:class="date-time" presentation:placeholder="false">
        <draw:text-box>
          <text:p text:style-name="a486" text:class-names="" text:cond-style-name=""><text:span text:style-name="a484" text:class-names=""><text:date text:fixed="false" style:data-style-name="a485">8/22/2025</text:date></text:span></text:p>
        </draw:text-box>
        <svg:title/>
        <svg:desc/>
      </draw:frame>
      <draw:frame draw:id="id51" presentation:style-name="a490" draw:name="Footer Placeholder 5" svg:x="9.70748in" svg:y="7.05709in" svg:width="3.06803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12.72109in" svg:y="7.05709in" svg:width="0.46939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8/22/2025</text:date></text:span></text:p>
          </draw:text-box>
          <svg:title/>
          <svg:desc/>
        </draw:frame>
        <draw:page-thumbnail svg:x="0.75in" svg:y="1.25in" svg:width="6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65in" svg:y="0.61in" svg:width="3.93223in" svg:height="2.41941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5.53731in" svg:y="0.71862in" svg:width="7.09065in" svg:height="6.07601in" presentation:class="graphic" presentation:placeholder="false">
        <draw:text-box>
          <text:p text:style-name="a529" text:class-names="" text:cond-style-name=""><text:span text:style-name="a528" text:class-names="">Click icon to add picture</text:span></text:p>
        </draw:text-box>
        <svg:title/>
        <svg:desc/>
      </draw:frame>
      <draw:frame draw:id="id55" presentation:style-name="a534" draw:name="Text Placeholder 3" svg:x="0.66667in" svg:y="3.0907in" svg:width="3.92124in" svg:height="3.75617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15in" svg:y="7.05709in" svg:width="3.82143in" svg:height="0.39931in" presentation:class="date-time" presentation:placeholder="false">
        <draw:text-box>
          <text:p text:style-name="a537" text:class-names="" text:cond-style-name=""><text:span text:style-name="a535" text:class-names=""><text:date text:fixed="false" style:data-style-name="a536">8/22/2025</text:date></text:span></text:p>
        </draw:text-box>
        <svg:title/>
        <svg:desc/>
      </draw:frame>
      <draw:frame draw:id="id57" presentation:style-name="a541" draw:name="Footer Placeholder 5" svg:x="9.70748in" svg:y="7.05709in" svg:width="3.06803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12.72109in" svg:y="7.05709in" svg:width="0.46939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8/22/2025</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67in" svg:y="0.6in" svg:width="11.5in" svg:height="1.2382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67in" svg:y="1.83825in" svg:width="11.5in" svg:height="4.91696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15in" svg:y="7.05709in" svg:width="3.82143in" svg:height="0.39931in" presentation:class="date-time" presentation:placeholder="false">
        <draw:text-box>
          <text:p text:style-name="a597" text:class-names="" text:cond-style-name=""><text:span text:style-name="a595" text:class-names=""><text:date text:fixed="false" style:data-style-name="a596">8/22/2025</text:date></text:span></text:p>
        </draw:text-box>
        <svg:title/>
        <svg:desc/>
      </draw:frame>
      <draw:frame draw:id="id62" presentation:style-name="a601" draw:name="Footer Placeholder 4" svg:x="9.70748in" svg:y="7.05709in" svg:width="3.06803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12.72109in" svg:y="7.05709in" svg:width="0.46939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8/22/2025</text:date></text:span></text:p>
          </draw:text-box>
          <svg:title/>
          <svg:desc/>
        </draw:frame>
        <draw:page-thumbnail svg:x="0.75in" svg:y="1.25in" svg:width="6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10.53684in" svg:y="0.63265in" svg:width="2.23867in" svg:height="6.12256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91667in" svg:y="0.63265in" svg:width="9.62017in" svg:height="6.12256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15in" svg:y="7.05709in" svg:width="3.82143in" svg:height="0.39931in" presentation:class="date-time" presentation:placeholder="false">
        <draw:text-box>
          <text:p text:style-name="a657" text:class-names="" text:cond-style-name=""><text:span text:style-name="a655" text:class-names=""><text:date text:fixed="false" style:data-style-name="a656">8/22/2025</text:date></text:span></text:p>
        </draw:text-box>
        <svg:title/>
        <svg:desc/>
      </draw:frame>
      <draw:frame draw:id="id67" presentation:style-name="a661" draw:name="Footer Placeholder 4" svg:x="9.70748in" svg:y="7.05709in" svg:width="3.06803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12.72109in" svg:y="7.05709in" svg:width="0.46939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8/22/2025</text:date></text:span></text:p>
          </draw:text-box>
          <svg:title/>
          <svg:desc/>
        </draw:frame>
        <draw:page-thumbnail svg:x="0.75in" svg:y="1.25in" svg:width="6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BDALLAH KHALED</meta:initial-creator>
    <dc:creator>ABDALLAH KHALED</dc:creator>
    <meta:creation-date>2025-08-22T10:34:17Z</meta:creation-date>
    <dc:date>2025-08-22T15:08:21Z</dc:date>
    <meta:editing-cycles>3</meta:editing-cycles>
    <meta:editing-duration>PT14637S</meta:editing-duration>
    <meta:document-statistic meta:paragraph-count="194" meta:word-count="1772"/>
  </office:meta>
</office:document-meta>
</file>